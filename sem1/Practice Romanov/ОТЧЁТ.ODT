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2363B810C4BBD79267C.png" manifest:media-type="image/png"/>
  <manifest:file-entry manifest:full-path="Pictures/10000000000004B000000EAFC32FB404A930C653.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Calibri" fo:font-size="9pt" style:text-underline-style="solid" style:text-underline-width="auto" style:text-underline-color="font-color" officeooo:rsid="001e02f3" officeooo:paragraph-rsid="001e02f3" style:font-size-asian="9pt" style:font-size-complex="9pt"/>
    </style:style>
    <style:style style:name="P3" style:family="paragraph" style:parent-style-name="Standard">
      <style:paragraph-properties fo:text-align="start" style:justify-single-word="false"/>
      <style:text-properties style:font-name="Calibri" fo:font-size="9pt" style:text-underline-style="solid" style:text-underline-width="auto" style:text-underline-color="font-color" officeooo:rsid="001e02f3" officeooo:paragraph-rsid="001e02f3" style:font-size-asian="7.84999990463257pt" style:font-size-complex="9pt"/>
    </style:style>
    <style:style style:name="P4" style:family="paragraph" style:parent-style-name="Standard">
      <style:paragraph-properties fo:text-align="start" style:justify-single-word="false"/>
      <style:text-properties style:font-name="Calibri" fo:font-size="9pt" style:text-underline-style="solid" style:text-underline-width="auto" style:text-underline-color="font-color" officeooo:rsid="001f293b" officeooo:paragraph-rsid="001f293b" style:font-size-asian="7.84999990463257pt" style:font-size-complex="9pt"/>
    </style:style>
    <style:style style:name="P5" style:family="paragraph" style:parent-style-name="Standard">
      <style:paragraph-properties fo:text-align="start" style:justify-single-word="false"/>
      <style:text-properties style:font-name="Calibri" fo:font-size="9pt" style:text-underline-style="solid" style:text-underline-width="auto" style:text-underline-color="font-color" officeooo:rsid="001f293b" officeooo:paragraph-rsid="001e02f3" style:font-size-asian="7.84999990463257pt" style:font-size-complex="9pt"/>
    </style:style>
    <style:style style:name="P6" style:family="paragraph" style:parent-style-name="Standard">
      <style:paragraph-properties fo:text-align="center" style:justify-single-word="false"/>
      <style:text-properties style:font-name="Calibri" fo:font-size="9pt" style:text-underline-style="none" officeooo:rsid="001e02f3" officeooo:paragraph-rsid="001f293b" style:font-size-asian="9pt" style:font-size-complex="9pt"/>
    </style:style>
    <style:style style:name="P7" style:family="paragraph" style:parent-style-name="Standard">
      <style:paragraph-properties fo:text-align="start" style:justify-single-word="false"/>
      <style:text-properties style:font-name="Calibri" fo:font-size="9pt" style:text-underline-style="none" officeooo:rsid="001e02f3" officeooo:paragraph-rsid="001e02f3" style:font-size-asian="9pt" style:font-size-complex="9pt"/>
    </style:style>
    <style:style style:name="P8" style:family="paragraph" style:parent-style-name="Standard">
      <style:paragraph-properties fo:text-align="start" style:justify-single-word="false"/>
      <style:text-properties style:font-name="Calibri" fo:font-size="9pt" style:text-underline-style="none" officeooo:rsid="001e02f3" officeooo:paragraph-rsid="001e02f3" style:font-size-asian="7.84999990463257pt" style:font-size-complex="9pt"/>
    </style:style>
    <style:style style:name="P9" style:family="paragraph" style:parent-style-name="Standard">
      <style:paragraph-properties fo:text-align="start" style:justify-single-word="false"/>
      <style:text-properties style:font-name="Calibri" fo:font-size="9pt" style:text-underline-style="none" officeooo:rsid="001f293b" officeooo:paragraph-rsid="001f293b" style:font-size-asian="7.84999990463257pt" style:font-size-complex="9pt"/>
    </style:style>
    <style:style style:name="P10" style:family="paragraph" style:parent-style-name="Standard">
      <style:paragraph-properties fo:text-align="center" style:justify-single-word="false"/>
      <style:text-properties style:font-name="Calibri" fo:font-size="9pt" style:text-underline-style="none" officeooo:rsid="001f8946" officeooo:paragraph-rsid="001f8946" style:font-size-asian="7.84999990463257pt" style:font-size-complex="9pt"/>
    </style:style>
    <style:style style:name="P11" style:family="paragraph" style:parent-style-name="Standard">
      <style:paragraph-properties fo:text-align="start" style:justify-single-word="false"/>
      <style:text-properties style:font-name="Calibri" fo:font-size="9pt" officeooo:rsid="001e02f3" officeooo:paragraph-rsid="001e02f3" style:font-size-asian="9pt" style:font-size-complex="9pt"/>
    </style:style>
    <style:style style:name="P12" style:family="paragraph" style:parent-style-name="Standard">
      <style:paragraph-properties fo:text-align="center" style:justify-single-word="false"/>
      <style:text-properties style:font-name="Calibri" fo:font-size="9pt" officeooo:rsid="001e02f3" officeooo:paragraph-rsid="001e02f3" style:font-size-asian="9pt" style:font-size-complex="9pt"/>
    </style:style>
    <style:style style:name="P13" style:family="paragraph" style:parent-style-name="Standard">
      <style:paragraph-properties fo:text-align="center" style:justify-single-word="false"/>
      <style:text-properties style:font-name="Calibri" fo:font-size="24pt" style:text-underline-style="solid" style:text-underline-width="auto" style:text-underline-color="font-color" fo:font-weight="bold" officeooo:rsid="001e02f3" officeooo:paragraph-rsid="001e02f3" style:font-size-asian="21pt" style:font-weight-asian="bold" style:font-size-complex="24pt" style:font-weight-complex="bold"/>
    </style:style>
    <style:style style:name="P14" style:family="paragraph" style:parent-style-name="Standard">
      <style:paragraph-properties fo:text-align="center" style:justify-single-word="false"/>
      <style:text-properties style:font-name="Calibri" fo:font-size="24pt" style:text-underline-style="solid" style:text-underline-width="auto" style:text-underline-color="font-color" fo:font-weight="bold" officeooo:rsid="0049b9d9" officeooo:paragraph-rsid="0049b9d9" style:font-size-asian="21pt" style:font-weight-asian="bold" style:font-size-complex="24pt" style:font-weight-complex="bold"/>
    </style:style>
    <style:style style:name="P15" style:family="paragraph" style:parent-style-name="Standard">
      <style:paragraph-properties fo:text-align="center" style:justify-single-word="false"/>
      <style:text-properties style:font-name="Calibri" fo:font-size="6pt" style:text-underline-style="none" officeooo:rsid="001e02f3" officeooo:paragraph-rsid="001e02f3" style:font-size-asian="5.25pt" style:font-size-complex="6pt"/>
    </style:style>
    <style:style style:name="P16" style:family="paragraph" style:parent-style-name="Standard">
      <style:paragraph-properties fo:text-align="center" style:justify-single-word="false"/>
      <style:text-properties style:font-name="Calibri" fo:font-size="10pt" officeooo:rsid="001e02f3" officeooo:paragraph-rsid="001e02f3" style:font-size-asian="10pt" style:font-size-complex="10pt"/>
    </style:style>
    <style:style style:name="P17" style:family="paragraph" style:parent-style-name="Standard">
      <style:paragraph-properties fo:text-align="start" style:justify-single-word="false"/>
      <style:text-properties style:font-name="Calibri" fo:font-size="10pt" style:text-underline-style="none" officeooo:rsid="001e02f3" officeooo:paragraph-rsid="001e02f3" style:font-size-asian="10pt" style:font-size-complex="10pt"/>
    </style:style>
    <style:style style:name="P18" style:family="paragraph" style:parent-style-name="Standard">
      <style:paragraph-properties fo:text-align="start" style:justify-single-word="false"/>
      <style:text-properties style:font-name="Calibri" fo:font-size="10pt" style:text-underline-style="none" officeooo:rsid="001f293b" officeooo:paragraph-rsid="001f293b" style:font-size-asian="10pt" style:font-size-complex="10pt"/>
    </style:style>
    <style:style style:name="P19" style:family="paragraph" style:parent-style-name="Standard">
      <style:paragraph-properties fo:text-align="start" style:justify-single-word="false"/>
      <style:text-properties style:font-name="Calibri" fo:font-size="10pt" style:text-underline-style="solid" style:text-underline-width="auto" style:text-underline-color="font-color" officeooo:rsid="001f293b" officeooo:paragraph-rsid="001e02f3" style:font-size-asian="10pt" style:font-size-complex="10pt"/>
    </style:style>
    <style:style style:name="P20" style:family="paragraph" style:parent-style-name="Standard">
      <style:paragraph-properties fo:text-align="start" style:justify-single-word="false"/>
      <style:text-properties style:font-name="Calibri" fo:font-size="11pt" fo:language="ru" fo:country="RU" style:text-underline-style="none" officeooo:rsid="0022fc0e" officeooo:paragraph-rsid="0022fc0e" style:font-size-asian="9.60000038146973pt" style:font-size-complex="11pt"/>
    </style:style>
    <style:style style:name="P21" style:family="paragraph" style:parent-style-name="Standard">
      <style:paragraph-properties fo:text-align="start" style:justify-single-word="false"/>
      <style:text-properties style:font-name="Calibri" fo:font-size="11pt" fo:language="ru" fo:country="RU" style:text-underline-style="none" officeooo:rsid="00245c8d" officeooo:paragraph-rsid="00245c8d" style:font-size-asian="9.60000038146973pt" style:font-size-complex="11pt"/>
    </style:style>
    <style:style style:name="P22" style:family="paragraph" style:parent-style-name="Standard">
      <style:paragraph-properties fo:text-align="start" style:justify-single-word="false"/>
      <style:text-properties style:font-name="Calibri" fo:font-size="11pt" fo:language="ru" fo:country="RU" style:text-underline-style="none" officeooo:rsid="00323719" officeooo:paragraph-rsid="0022fc0e" style:font-size-asian="9.60000038146973pt" style:font-size-complex="11pt"/>
    </style:style>
    <style:style style:name="P23" style:family="paragraph" style:parent-style-name="Standard">
      <style:paragraph-properties fo:text-align="start" style:justify-single-word="false"/>
      <style:text-properties style:font-name="Calibri" fo:font-size="11pt" fo:language="ru" fo:country="RU" style:text-underline-style="none" officeooo:rsid="0051d4c2" officeooo:paragraph-rsid="0051d4c2" style:font-size-asian="11pt" style:font-size-complex="11pt"/>
    </style:style>
    <style:style style:name="P24" style:family="paragraph" style:parent-style-name="Standard">
      <style:paragraph-properties fo:text-align="start" style:justify-single-word="false"/>
      <style:text-properties style:font-name="Calibri" fo:font-size="11pt" fo:language="ru" fo:country="RU" style:text-underline-style="none" officeooo:rsid="00532808" officeooo:paragraph-rsid="00532808" style:font-size-asian="11pt" style:font-size-complex="11pt"/>
    </style:style>
    <style:style style:name="P25" style:family="paragraph" style:parent-style-name="Standard">
      <style:paragraph-properties fo:text-align="start" style:justify-single-word="false"/>
      <style:text-properties style:font-name="Calibri" fo:font-size="11pt" fo:language="ru" fo:country="RU" style:text-underline-style="none" officeooo:rsid="0053d4e3" officeooo:paragraph-rsid="0053d4e3" style:font-size-asian="11pt" style:font-size-complex="11pt"/>
    </style:style>
    <style:style style:name="P26" style:family="paragraph" style:parent-style-name="Standard">
      <style:paragraph-properties fo:text-align="start" style:justify-single-word="false"/>
      <style:text-properties style:font-name="Calibri" fo:font-size="11pt" fo:language="en" fo:country="US" style:text-underline-style="none" officeooo:rsid="00532808" officeooo:paragraph-rsid="00532808" style:font-size-asian="11pt" style:font-size-complex="11pt"/>
    </style:style>
    <style:style style:name="P27" style:family="paragraph" style:parent-style-name="Standard">
      <style:paragraph-properties fo:text-align="center" style:justify-single-word="false"/>
      <style:text-properties style:font-name="Calibri" fo:font-size="18pt" fo:language="ru" fo:country="RU" style:text-underline-style="none" officeooo:rsid="00245c8d" officeooo:paragraph-rsid="00245c8d" style:font-size-asian="15.75pt" style:font-size-complex="18pt"/>
    </style:style>
    <style:style style:name="P28" style:family="paragraph" style:parent-style-name="Standard">
      <style:paragraph-properties fo:text-align="end" style:justify-single-word="false"/>
      <style:text-properties style:font-name="Calibri" fo:font-size="18pt" fo:language="ru" fo:country="RU" style:text-underline-style="none" fo:font-weight="bold" officeooo:rsid="00245c8d" officeooo:paragraph-rsid="00245c8d" style:font-size-asian="15.75pt" style:font-weight-asian="bold" style:font-size-complex="18pt" style:font-weight-complex="bold"/>
    </style:style>
    <style:style style:name="P29" style:family="paragraph" style:parent-style-name="Standard">
      <style:paragraph-properties fo:text-align="end" style:justify-single-word="false"/>
      <style:text-properties style:font-name="Calibri" fo:font-size="18pt" style:text-underline-style="none" fo:font-weight="bold" officeooo:rsid="00226537" officeooo:paragraph-rsid="00226537" style:font-size-asian="15.75pt" style:font-weight-asian="bold" style:font-size-complex="18pt" style:font-weight-complex="bold"/>
    </style:style>
    <style:style style:name="P30" style:family="paragraph" style:parent-style-name="Standard">
      <style:paragraph-properties fo:text-align="start" style:justify-single-word="false"/>
      <style:text-properties officeooo:paragraph-rsid="001f293b"/>
    </style:style>
    <style:style style:name="P31" style:family="paragraph" style:parent-style-name="Standard">
      <style:paragraph-properties fo:text-align="start" style:justify-single-word="false"/>
      <style:text-properties officeooo:paragraph-rsid="006266d6"/>
    </style:style>
    <style:style style:name="P32" style:family="paragraph" style:parent-style-name="Standard">
      <style:paragraph-properties fo:text-align="start" style:justify-single-word="false"/>
      <style:text-properties officeooo:paragraph-rsid="00638537"/>
    </style:style>
    <style:style style:name="P33"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329a5c" officeooo:paragraph-rsid="00329a5c" style:text-blinking="false" fo:background-color="transparent" style:font-size-asian="9.60000038146973pt" style:font-weight-asian="normal" style:font-size-complex="11pt" style:font-weight-complex="normal"/>
    </style:style>
    <style:style style:name="P34" style:family="paragraph" style:parent-style-name="Standard">
      <style:paragraph-properties fo:text-align="end"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351053" officeooo:paragraph-rsid="00351053" style:text-blinking="false" fo:background-color="transparent"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53d4e3" officeooo:paragraph-rsid="0053d4e3" style:text-blinking="false" fo:background-color="transparent"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59ef46" officeooo:paragraph-rsid="005ae9d9" style:text-blinking="false" fo:background-color="transparent"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5ae9d9" officeooo:paragraph-rsid="005ae9d9" style:text-blinking="false" fo:background-color="transparent"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5b2e89" officeooo:paragraph-rsid="005b2e89" style:text-blinking="false" fo:background-color="transparent"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351053" officeooo:paragraph-rsid="00566557" style:text-blinking="false" fo:background-color="transparent"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5fb95f" officeooo:paragraph-rsid="00604445" style:text-blinking="false" fo:background-color="transparent"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5fb95f" officeooo:paragraph-rsid="006179a7" style:text-blinking="false" fo:background-color="transparent"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6179a7" officeooo:paragraph-rsid="006179a7" style:text-blinking="false" fo:background-color="transparent"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604445" officeooo:paragraph-rsid="00604445" style:text-blinking="false" fo:background-color="transparent"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604445" officeooo:paragraph-rsid="00604a32" style:text-blinking="false" fo:background-color="transparent"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604a32" officeooo:paragraph-rsid="006179a7" style:text-blinking="false" fo:background-color="transparent"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ru" fo:country="RU" fo:font-style="italic" style:text-underline-style="none" fo:font-weight="normal" officeooo:rsid="00351053" officeooo:paragraph-rsid="00566557" style:text-blinking="false" fo:background-color="transparent" style:font-size-asian="11pt" style:font-style-asian="italic" style:font-weight-asian="normal" style:font-size-complex="11pt" style:font-weight-complex="normal"/>
    </style:style>
    <style:style style:name="P47"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en" fo:country="US" fo:font-style="normal" style:text-underline-style="none" fo:font-weight="normal" officeooo:rsid="0053d4e3" officeooo:paragraph-rsid="0053d4e3" style:text-blinking="false" fo:background-color="transparent" style:font-size-asian="9.60000038146973pt" style:font-weight-asian="normal" style:font-size-complex="11pt" style:font-weight-complex="normal"/>
    </style:style>
    <style:style style:name="P48" style:family="paragraph" style:parent-style-name="Standard">
      <style:paragraph-properties fo:text-align="center" style:justify-single-word="false"/>
      <style:text-properties fo:font-variant="normal" fo:text-transform="none" fo:color="#000000" style:text-line-through-style="none" style:text-line-through-type="none" style:font-name="Calibri" fo:font-size="11pt" fo:letter-spacing="normal" fo:language="en" fo:country="US" fo:font-style="normal" style:text-underline-style="none" fo:font-weight="normal" officeooo:rsid="005831a4" officeooo:paragraph-rsid="005831a4" style:text-blinking="false" fo:background-color="transparent"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1pt" fo:letter-spacing="normal" fo:language="en" fo:country="US" fo:font-style="normal" style:text-underline-style="none" fo:font-weight="normal" officeooo:rsid="00638537" officeooo:paragraph-rsid="00638537" style:text-blinking="false" fo:background-color="transparent" style:font-size-asian="9.60000038146973pt" style:font-weight-asian="normal" style:font-size-complex="11pt" style:font-weight-complex="normal"/>
    </style:style>
    <style:style style:name="P50" style:family="paragraph" style:parent-style-name="Standard">
      <style:paragraph-properties fo:text-align="center" style:justify-single-word="false"/>
      <style:text-properties fo:font-variant="normal" fo:text-transform="none" fo:color="#000000" style:text-line-through-style="none" style:text-line-through-type="none" style:font-name="Calibri" fo:font-size="18pt" fo:letter-spacing="normal" fo:language="ru" fo:country="RU" fo:font-style="normal" style:text-underline-style="none" fo:font-weight="bold" officeooo:rsid="005c6095" officeooo:paragraph-rsid="005c6095" style:text-blinking="false" fo:background-color="transparent" style:font-size-asian="18pt" style:font-weight-asian="bold" style:font-size-complex="18pt" style:font-weight-complex="bold"/>
    </style:style>
    <style:style style:name="P51" style:family="paragraph" style:parent-style-name="Standard">
      <style:paragraph-properties fo:text-align="end" style:justify-single-word="false"/>
      <style:text-properties fo:font-variant="normal" fo:text-transform="none" fo:color="#000000" style:text-line-through-style="none" style:text-line-through-type="none" style:font-name="Calibri" fo:font-size="18pt" fo:letter-spacing="normal" fo:language="ru" fo:country="RU" fo:font-style="normal" style:text-underline-style="none" fo:font-weight="bold" officeooo:rsid="005e6043" officeooo:paragraph-rsid="005e6043" style:text-blinking="false" fo:background-color="transparent" style:font-size-asian="18pt" style:font-weight-asian="bold" style:font-size-complex="18pt" style:font-weight-complex="bold"/>
    </style:style>
    <style:style style:name="P52" style:family="paragraph" style:parent-style-name="Standard">
      <style:paragraph-properties fo:text-align="end" style:justify-single-word="false"/>
      <style:text-properties fo:font-variant="normal" fo:text-transform="none" fo:color="#000000" style:text-line-through-style="none" style:text-line-through-type="none" style:font-name="Calibri" fo:font-size="18pt" fo:letter-spacing="normal" fo:language="ru" fo:country="RU" fo:font-style="normal" style:text-underline-style="none" fo:font-weight="bold" officeooo:rsid="005831a4" officeooo:paragraph-rsid="005831a4" style:text-blinking="false" fo:background-color="transparent" style:font-size-asian="18pt" style:font-weight-asian="bold" style:font-size-complex="18pt" style:font-weight-complex="bold"/>
    </style:style>
    <style:style style:name="P53" style:family="paragraph" style:parent-style-name="Standard">
      <style:paragraph-properties fo:text-align="end" style:justify-single-word="false"/>
      <style:text-properties fo:font-variant="normal" fo:text-transform="none" fo:color="#000000" style:text-line-through-style="none" style:text-line-through-type="none" style:font-name="Calibri" fo:font-size="18pt" fo:letter-spacing="normal" fo:language="ru" fo:country="RU" fo:font-style="normal" style:text-underline-style="none" fo:font-weight="bold" officeooo:rsid="005fb95f" officeooo:paragraph-rsid="005fb95f" style:text-blinking="false" fo:background-color="transparent" style:font-size-asian="18pt" style:font-weight-asian="bold" style:font-size-complex="18pt" style:font-weight-complex="bold"/>
    </style:style>
    <style:style style:name="P54" style:family="paragraph" style:parent-style-name="Standard">
      <style:paragraph-properties fo:text-align="start" style:justify-single-word="false"/>
      <style:text-properties fo:font-variant="normal" fo:text-transform="none" fo:color="#000000" style:text-line-through-style="none" style:text-line-through-type="none" style:font-name="Calibri" fo:font-size="18pt" fo:letter-spacing="normal" fo:language="ru" fo:country="RU" fo:font-style="normal" style:text-underline-style="none" fo:font-weight="bold" officeooo:rsid="005fb95f" officeooo:paragraph-rsid="005fb95f" style:text-blinking="false" fo:background-color="transparent" style:font-size-asian="18pt" style:font-weight-asian="bold" style:font-size-complex="18pt" style:font-weight-complex="bold"/>
    </style:style>
    <style:style style:name="P55" style:family="paragraph" style:parent-style-name="Standard">
      <style:paragraph-properties fo:text-align="end" style:justify-single-word="false"/>
      <style:text-properties fo:font-variant="normal" fo:text-transform="none" fo:color="#000000" style:text-line-through-style="none" style:text-line-through-type="none" style:font-name="Calibri" fo:font-size="18pt" fo:letter-spacing="normal" fo:language="ru" fo:country="RU" fo:font-style="normal" style:text-underline-style="none" fo:font-weight="bold" officeooo:rsid="005831a4" officeooo:paragraph-rsid="005831a4" style:text-blinking="false" fo:background-color="transparent" style:font-size-asian="18pt" style:font-style-asian="normal" style:font-weight-asian="bold" style:font-size-complex="18pt" style:font-style-complex="normal" style:font-weight-complex="bold"/>
    </style:style>
    <style:style style:name="P56" style:family="paragraph" style:parent-style-name="Standard">
      <style:paragraph-properties fo:text-align="end" style:justify-single-word="false"/>
      <style:text-properties fo:font-variant="normal" fo:text-transform="none" fo:color="#000000" style:text-line-through-style="none" style:text-line-through-type="none" style:font-name="Calibri" fo:font-size="18pt" fo:letter-spacing="normal" fo:language="ru" fo:country="RU" fo:font-style="normal" style:text-underline-style="none" fo:font-weight="bold" officeooo:rsid="005831a4" officeooo:paragraph-rsid="00351053" style:text-blinking="false" fo:background-color="transparent" style:font-size-asian="18pt" style:font-weight-asian="bold" style:font-size-complex="18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5a2510"/>
    </style:style>
    <style:style style:name="T3" style:family="text">
      <style:text-properties fo:font-variant="normal" fo:text-transform="none" fo:color="#000000" style:font-name="Calibri" fo:font-size="11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6266d6" style:text-blinking="false" fo:background-color="transparent" loext:char-shading-value="0" style:font-size-asian="11pt" style:font-weight-asian="normal" style:font-size-complex="11pt" style:font-weight-complex="normal"/>
    </style:style>
    <style:style style:name="T5" style:family="text">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638537" style:text-blinking="false" fo:background-color="transparent" loext:char-shading-value="0" style:font-size-asian="11pt" style:font-weight-asian="normal" style:font-size-complex="11pt" style:font-weight-complex="normal"/>
    </style:style>
    <style:style style:name="T6" style:family="text">
      <style:text-properties fo:font-variant="normal" fo:text-transform="none" fo:color="#000000" style:text-line-through-style="none" style:text-line-through-type="none" style:font-name="Calibri" fo:font-size="11pt" fo:letter-spacing="normal" fo:language="ru" fo:country="RU" fo:font-style="normal" style:text-underline-style="none" fo:font-weight="normal" officeooo:rsid="004b2313" style:text-blinking="false" fo:background-color="transparent" loext:char-shading-value="0" style:font-size-asian="11pt" style:font-weight-asian="normal" style:font-size-complex="11pt" style:font-weight-complex="normal"/>
    </style:style>
    <style:style style:name="T7" style:family="text">
      <style:text-properties fo:font-variant="normal" fo:text-transform="none" fo:color="#000000" style:text-line-through-style="none" style:text-line-through-type="none" style:font-name="Calibri" fo:font-size="11pt" fo:letter-spacing="normal" fo:language="en" fo:country="US" fo:font-style="normal" style:text-underline-style="none" fo:font-weight="normal" officeooo:rsid="006266d6" style:text-blinking="false" fo:background-color="transparent" loext:char-shading-value="0" style:font-size-asian="11pt" style:font-weight-asian="normal" style:font-size-complex="11pt" style:font-weight-complex="normal"/>
    </style:style>
    <style:style style:name="T8" style:family="text">
      <style:text-properties fo:font-variant="normal" fo:text-transform="none" fo:color="#000000" style:text-line-through-style="none" style:text-line-through-type="none" style:font-name="Calibri" fo:font-size="11pt" fo:letter-spacing="normal" fo:language="en" fo:country="US" fo:font-style="normal" style:text-underline-style="none" fo:font-weight="normal" officeooo:rsid="00638537" style:text-blinking="false" fo:background-color="transparent" loext:char-shading-value="0" style:font-size-asian="9.60000038146973pt" style:font-weight-asian="normal" style:font-size-complex="11pt" style:font-weight-complex="normal"/>
    </style:style>
    <style:style style:name="T9" style:family="text">
      <style:text-properties style:font-name="Calibri" fo:font-size="9pt" style:text-underline-style="none" officeooo:rsid="001e02f3" style:font-size-asian="9pt" style:font-size-complex="9pt"/>
    </style:style>
    <style:style style:name="T10" style:family="text">
      <style:text-properties style:font-name="Calibri" fo:font-size="9pt" style:text-underline-style="solid" style:text-underline-width="auto" style:text-underline-color="font-color" officeooo:rsid="001e02f3" style:font-size-asian="9pt" style:font-size-complex="9pt"/>
    </style:style>
    <style:style style:name="T11" style:family="text">
      <style:text-properties style:font-name="Calibri" fo:font-size="10pt" style:text-underline-style="solid" style:text-underline-width="auto" style:text-underline-color="font-color" officeooo:rsid="001e02f3" style:font-size-asian="10pt" style:font-size-complex="10pt"/>
    </style:style>
    <style:style style:name="T12" style:family="text">
      <style:text-properties style:font-name="Calibri" fo:font-size="10pt" style:text-underline-style="none" officeooo:rsid="001e02f3" style:font-size-asian="10pt" style:font-size-complex="10pt"/>
    </style:style>
    <style:style style:name="T13" style:family="text">
      <style:text-properties style:text-underline-style="none"/>
    </style:style>
    <style:style style:name="T14" style:family="text">
      <style:text-properties fo:font-size="6pt" fo:language="ru" fo:country="RU" style:text-underline-style="none" style:font-size-asian="6pt" style:font-size-complex="6pt"/>
    </style:style>
    <style:style style:name="T15" style:family="text">
      <style:text-properties fo:font-size="6pt" style:text-underline-style="none" style:font-size-asian="6pt" style:font-size-complex="6pt"/>
    </style:style>
    <style:style style:name="T16" style:family="text">
      <style:text-properties fo:font-size="6pt" style:text-underline-style="none" officeooo:rsid="001f8946" style:font-size-asian="6pt" style:font-size-complex="6pt"/>
    </style:style>
    <style:style style:name="T17" style:family="text">
      <style:text-properties fo:font-size="10pt" style:font-size-asian="10pt" style:font-size-complex="10pt"/>
    </style:style>
    <style:style style:name="T18" style:family="text">
      <style:text-properties fo:font-size="10pt" style:text-underline-style="solid" style:text-underline-width="auto" style:text-underline-color="font-color" style:font-size-asian="10pt" style:font-size-complex="10pt"/>
    </style:style>
    <style:style style:name="T19" style:family="text">
      <style:text-properties fo:font-size="10pt" style:text-underline-style="none" style:font-size-asian="10pt" style:font-size-complex="10pt"/>
    </style:style>
    <style:style style:name="T20" style:family="text">
      <style:text-properties officeooo:rsid="002248e4"/>
    </style:style>
    <style:style style:name="T21" style:family="text">
      <style:text-properties fo:font-size="11pt" style:font-size-asian="11pt" style:font-size-complex="11pt"/>
    </style:style>
    <style:style style:name="T22" style:family="text">
      <style:text-properties fo:font-size="11pt" style:text-underline-style="solid" style:text-underline-width="auto" style:text-underline-color="font-color" style:font-size-asian="11pt" style:font-size-complex="11pt"/>
    </style:style>
    <style:style style:name="T23" style:family="text">
      <style:text-properties fo:font-size="11pt" style:text-underline-style="solid" style:text-underline-width="auto" style:text-underline-color="font-color" officeooo:rsid="0049b9d9" style:font-size-asian="11pt" style:font-size-complex="11pt"/>
    </style:style>
    <style:style style:name="T24" style:family="text">
      <style:text-properties fo:font-size="11pt" fo:language="ru" fo:country="RU" style:text-underline-style="solid" style:text-underline-width="auto" style:text-underline-color="font-color" officeooo:rsid="0047be06" style:font-size-asian="11pt" style:font-size-complex="11pt"/>
    </style:style>
    <style:style style:name="T25" style:family="text">
      <style:text-properties officeooo:rsid="002749f3"/>
    </style:style>
    <style:style style:name="T26" style:family="text">
      <style:text-properties officeooo:rsid="00329a5c"/>
    </style:style>
    <style:style style:name="T27" style:family="text">
      <style:text-properties fo:language="en" fo:country="US"/>
    </style:style>
    <style:style style:name="T28" style:family="text">
      <style:text-properties fo:language="en" fo:country="US" style:text-underline-style="solid" style:text-underline-width="auto" style:text-underline-color="font-color" officeooo:rsid="00566557"/>
    </style:style>
    <style:style style:name="T29" style:family="text">
      <style:text-properties fo:language="en" fo:country="US" officeooo:rsid="005b2e89"/>
    </style:style>
    <style:style style:name="T30" style:family="text">
      <style:text-properties fo:language="en" fo:country="US" officeooo:rsid="00604445"/>
    </style:style>
    <style:style style:name="T31" style:family="text">
      <style:text-properties fo:language="en" fo:country="US" officeooo:rsid="00604a32"/>
    </style:style>
    <style:style style:name="T32" style:family="text">
      <style:text-properties fo:language="ru" fo:country="RU"/>
    </style:style>
    <style:style style:name="T33" style:family="text">
      <style:text-properties fo:language="ru" fo:country="RU" officeooo:rsid="00329a5c"/>
    </style:style>
    <style:style style:name="T34" style:family="text">
      <style:text-properties fo:language="ru" fo:country="RU" officeooo:rsid="004b2313"/>
    </style:style>
    <style:style style:name="T35" style:family="text">
      <style:text-properties officeooo:rsid="00532808"/>
    </style:style>
    <style:style style:name="T36" style:family="text">
      <style:text-properties officeooo:rsid="0053d4e3"/>
    </style:style>
    <style:style style:name="T37" style:family="text">
      <style:text-properties fo:font-style="italic" style:font-style-asian="italic"/>
    </style:style>
    <style:style style:name="T38" style:family="text">
      <style:text-properties style:font-style-asian="normal"/>
    </style:style>
    <style:style style:name="T39" style:family="text">
      <style:text-properties style:font-style-asian="normal" style:font-style-complex="normal"/>
    </style:style>
    <style:style style:name="T40" style:family="text">
      <style:text-properties officeooo:rsid="0063fd9e" style:font-style-asian="normal" style:font-style-complex="normal"/>
    </style:style>
    <style:style style:name="T41" style:family="text">
      <style:text-properties officeooo:rsid="00638537" style:font-style-asian="normal"/>
    </style:style>
    <style:style style:name="T42" style:family="text">
      <style:text-properties officeooo:rsid="005a2510"/>
    </style:style>
    <style:style style:name="T43" style:family="text">
      <style:text-properties officeooo:rsid="005ae9d9"/>
    </style:style>
    <style:style style:name="T44" style:family="text">
      <style:text-properties officeooo:rsid="005b2e89"/>
    </style:style>
    <style:style style:name="T45" style:family="text">
      <style:text-properties officeooo:rsid="005fb95f"/>
    </style:style>
    <style:style style:name="T46" style:family="text">
      <style:text-properties officeooo:rsid="00604445"/>
    </style:style>
    <style:style style:name="T47" style:family="text">
      <style:text-properties officeooo:rsid="00604a32"/>
    </style:style>
    <style:style style:name="T48" style:family="text">
      <style:text-properties officeooo:rsid="006266d6"/>
    </style:style>
    <style:style style:name="T49" style:family="text">
      <style:text-properties officeooo:rsid="00638537"/>
    </style:style>
    <style:style style:name="T50" style:family="text">
      <style:text-properties style:font-size-asian="11pt"/>
    </style:style>
    <style:style style:name="T51" style:family="text">
      <style:text-properties officeooo:rsid="0063fd9e"/>
    </style:style>
    <style:style style:name="T52" style:family="text">
      <style:text-properties officeooo:rsid="0065ed41"/>
    </style:style>
    <style:style style:name="T53" style:family="text">
      <style:text-properties officeooo:rsid="00677773"/>
    </style:style>
    <style:style style:name="T54" style:family="text">
      <style:text-properties officeooo:rsid="0069b8c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Федеральное государственное бюджетное образовательное учреждение</text:p>
      <text:p text:style-name="P16">высшего профессионального образования</text:p>
      <text:p text:style-name="P16"><draw:frame draw:style-name="fr1" draw:name="Изображение1" text:anchor-type="paragraph" svg:y="2.067cm" svg:width="4.348cm" svg:height="5.128cm" draw:z-index="0"><draw:image xlink:href="Pictures/10000000000001E0000002363B810C4BBD79267C.png" xlink:type="simple" xlink:show="embed" xlink:actuate="onLoad"/></draw:frame>«Московский государственный технический университет имени Н.Э. Баумана»</text:p>
      <text:p text:style-name="P16">(МГТУ им. Н.Э. Баумана)</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pan text:style-name="T17">Факультет <text:s text:c="2"/></text:span><text:span text:style-name="T18"><text:s text:c="61"/></text:span><text:span text:style-name="T22">Информатика и системы управления </text:span><text:span text:style-name="T18"><text:s text:c="17"/></text:span><text:span text:style-name="T1"><text:s text:c="65"/></text:span></text:p>
      <text:p text:style-name="P7"/>
      <text:p text:style-name="P30"><text:span text:style-name="T12">Кафедра</text:span><text:span text:style-name="T9"> <text:s text:c="2"/></text:span><text:span text:style-name="T10"><text:s text:c="35"/></text:span><text:span text:style-name="T11"><text:s/></text:span><text:span text:style-name="T3">Программное обеспечение ЭВМ и информационные технологии</text:span><text:span text:style-name="T18"> </text:span><text:span text:style-name="T11"><text:s text:c="11"/></text:span><text:span text:style-name="T10"><text:s text:c="80"/></text:span></text:p>
      <text:p text:style-name="P2"/>
      <text:p text:style-name="P2"/>
      <text:p text:style-name="P2"/>
      <text:p text:style-name="P13"/>
      <text:p text:style-name="P13"/>
      <text:p text:style-name="P14"><text:span text:style-name="T13"><text:s text:c="2"/></text:span>Квадратник<text:span text:style-name="T53">и</text:span></text:p>
      <text:p text:style-name="P6"><text:s/></text:p>
      <text:p text:style-name="P7"/>
      <text:p text:style-name="P7"><text:span text:style-name="T17">Студент <text:s text:c="2"/></text:span><text:span text:style-name="T18"><text:s text:c="64"/></text:span><text:span text:style-name="T23">Романов Алексей Васильевич</text:span><text:span text:style-name="T22"> </text:span><text:span text:style-name="T18"><text:s text:c="6"/></text:span><text:span text:style-name="T1"><text:s text:c="80"/></text:span></text:p>
      <text:p text:style-name="P15">(фамилия, имя, отчество)</text:p>
      <text:p text:style-name="P15"/>
      <text:p text:style-name="P17">Группа <text:s text:c="2"/><text:span text:style-name="T1"><text:s text:c="7"/></text:span><text:span text:style-name="T22">ИУ7-13Б </text:span><text:span text:style-name="T1"><text:s text:c="6"/></text:span></text:p>
      <text:p text:style-name="P3"/>
      <text:p text:style-name="P8"><text:span text:style-name="T17">Название практики <text:s text:c="2"/></text:span><text:span text:style-name="T18"><text:s text:c="39"/></text:span><text:span text:style-name="T24">Учебно-вычислительный практикум <text:s text:c="56"/></text:span></text:p>
      <text:p text:style-name="P5"/>
      <text:p text:style-name="P5"/>
      <text:p text:style-name="P5"/>
      <text:p text:style-name="P5"/>
      <text:p text:style-name="P5"/>
      <text:p text:style-name="P5"/>
      <text:p text:style-name="P19"/>
      <text:p text:style-name="P18">Руководитель</text:p>
      <text:p text:style-name="P9"/>
      <text:p text:style-name="P4"><text:span text:style-name="T17"><text:s text:c="2"/></text:span><text:span text:style-name="T21">Преподаватель</text:span><text:span text:style-name="T17"> <text:s/></text:span><text:span text:style-name="T19"><text:s text:c="5"/></text:span><text:span text:style-name="T13"><text:s text:c="57"/></text:span><text:span text:style-name="T19"><text:s text:c="8"/></text:span><text:span text:style-name="T17"><text:s text:c="3"/></text:span><text:span text:style-name="T21">Борисов С.В</text:span><text:span text:style-name="T17">. <text:s text:c="3"/></text:span><text:span text:style-name="T13"><text:s text:c="69"/></text:span><text:s text:c="35"/><text:span text:style-name="T13"><text:s text:c="9"/></text:span></text:p>
      <text:p text:style-name="P4"><text:span text:style-name="T14"><text:s text:c="14"/>Должность</text:span><text:span text:style-name="T15"> </text:span><text:span text:style-name="T13"><text:s text:c="73"/></text:span><text:span text:style-name="T15"><text:s text:c="17"/></text:span><text:span text:style-name="T16"><text:s text:c="21"/></text:span><text:span text:style-name="T15">ФИО <text:s text:c="137"/>Подпись</text:span></text:p>
      <text:p text:style-name="P4"/>
      <text:p text:style-name="P4"/>
      <text:p text:style-name="P15"/>
      <text:p text:style-name="P15"/>
      <text:p text:style-name="P15"/>
      <text:p text:style-name="P15"/>
      <text:p text:style-name="P10"/>
      <text:p text:style-name="P10">Москва, 201<text:span text:style-name="T20">8</text:span></text:p>
      <text:p text:style-name="P29"><text:soft-page-break/>Оглавление.</text:p>
      <text:p text:style-name="P20"/>
      <text:p text:style-name="P20"/>
      <text:p text:style-name="P20">Условие задачи___________________________________________________________________ ___<text:span text:style-name="T28"> </text:span><text:span text:style-name="T51">3</text:span></text:p>
      <text:p text:style-name="P20"/>
      <text:p text:style-name="P20"/>
      <text:p text:style-name="P20">Схема программы_____________________________________________________________________<text:span text:style-name="T36">5</text:span></text:p>
      <text:p text:style-name="P20"/>
      <text:p text:style-name="P20"/>
      <text:p text:style-name="P20">Описание программы__________________________________________________________________<text:span text:style-name="T45">6</text:span></text:p>
      <text:p text:style-name="P20"/>
      <text:p text:style-name="P20"/>
      <text:p text:style-name="P21">Текст программы с комментариями______________________________________________________<text:span text:style-name="T51">7</text:span></text:p>
      <text:p text:style-name="P21"/>
      <text:p text:style-name="P21"/>
      <text:p text:style-name="P21">Заключение__________________________________________________________________________1<text:span text:style-name="T51">6</text:span></text:p>
      <text:p text:style-name="P21"/>
      <text:p text:style-name="P21"/>
      <text:p text:style-name="P21">Список литературы____________________________________________________________________1<text:span text:style-name="T51">6</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
      <text:p text:style-name="P22"/>
      <text:p text:style-name="P28"><text:soft-page-break/>Условие задачи<text:span text:style-name="T25">.</text:span></text:p>
      <text:p text:style-name="P27"/>
      <text:p text:style-name="P23">Детская настольная игра состоит из квадратного м<text:span text:style-name="T52">н</text:span>ожества точек, которые содержат линии, соединяющие пары соседних (смежных) точек. Одна часть игры требует, чтобы участник (играющий) считал количество квадратов некоторого размера образованных этими линиями. </text:p>
      <text:p text:style-name="P23"/>
      <text:p text:style-name="P23">Ваша задача состоит в том, чтобы написать программу, которая автоматизирует процесс подсчёта всех возможных квадратов.</text:p>
      <text:p text:style-name="P23"/>
      <text:p text:style-name="P23">Ввод .</text:p>
      <text:p text:style-name="P23"/>
      <text:p text:style-name="P23">Вводный файл представляет из себя серии игровых точек. Каждая доска состоит из описания квадратного множества <text:span text:style-name="T27">N ^ 2 </text:span>точек (<text:span text:style-name="T27">2 &lt;= N &lt;= 9) </text:span>и какой-то взаимосвязью горизонтальных и вертикальных линий. Запись для одной доски с <text:span text:style-name="T27">N ^ 2 </text:span>и <text:span text:style-name="T27">m </text:span>связывающих линий задаётся в следующем виде:</text:p>
      <text:p text:style-name="P23"/>
      <text:p text:style-name="P23">Строка 1: <text:span text:style-name="T27">N - </text:span>кол-во точек в одном ряду или колонне множества</text:p>
      <text:p text:style-name="P23">Строка 2: <text:s/><text:span text:style-name="T27">m – </text:span>кол-во связывающих линий.</text:p>
      <text:p text:style-name="P23"/>
      <text:p text:style-name="P23">Каждая из последующих строк задаётся в таком виде <text:span text:style-name="T35">и может двух типов</text:span>: </text:p>
      <text:p text:style-name="P24"/>
      <text:p text:style-name="P24">1. <text:span text:style-name="T27">H i j – </text:span>указывает горизонтальную линию в ряду <text:span text:style-name="T27">i, </text:span>которая соединяет точку в колонне <text:span text:style-name="T27">j </text:span>с другой, которая находится в колонне <text:span text:style-name="T27">j+1.</text:span></text:p>
      <text:p text:style-name="P24"><text:span text:style-name="T27">2. V i j – </text:span>указывает вертикальную линию в колонне <text:span text:style-name="T27">i, </text:span>которая соединяет точку в ряду <text:span text:style-name="T27">j </text:span>с другой, которая находится в ряду <text:span text:style-name="T27">j+1.</text:span></text:p>
      <text:p text:style-name="P26"/>
      <text:p text:style-name="P24">Конец ввода указывается концом файла.</text:p>
      <text:p text:style-name="P24"/>
      <text:p text:style-name="P24">Пример входных данных:</text:p>
      <text:p text:style-name="P25"/>
      <text:p text:style-name="P25">3</text:p>
      <text:p text:style-name="P25">12</text:p>
      <text:p text:style-name="P25">V 3 1</text:p>
      <text:p text:style-name="P25">H 3 2 </text:p>
      <text:p text:style-name="P25">V 2 1</text:p>
      <text:p text:style-name="P25">V 2 2</text:p>
      <text:p text:style-name="P25">H 1 2</text:p>
      <text:p text:style-name="P25">H 2 1</text:p>
      <text:p text:style-name="P25">H 1 1</text:p>
      <text:p text:style-name="P25">H 2 2</text:p>
      <text:p text:style-name="P25">H 3 1</text:p>
      <text:p text:style-name="P25">V 1 1</text:p>
      <text:p text:style-name="P25">V 1 2</text:p>
      <text:p text:style-name="P25">V 3 2</text:p>
      <text:p text:style-name="P25"/>
      <text:p text:style-name="P25">2</text:p>
      <text:p text:style-name="P25">3</text:p>
      <text:p text:style-name="P25">H 1 1 </text:p>
      <text:p text:style-name="P25">V 1 1 </text:p>
      <text:p text:style-name="P25">V 2 1</text:p>
      <text:p text:style-name="P35"><text:soft-page-break/></text:p>
      <text:p text:style-name="P35">Вывод.</text:p>
      <text:p text:style-name="P35"/>
      <text:p text:style-name="P35">Для каждой партии — выводить номер партии: «Партия №1»<text:span text:style-name="T27">, <text:s/></text:span>«Партия №2» и т. д. Вывод для партии состоит из количества квадратов каждого размера на доске, от наименьшего к наибольшему. Если квадратов не существует — вывести соответствующую запись.</text:p>
      <text:p text:style-name="P35"/>
      <text:p text:style-name="P35">Пример вывода:</text:p>
      <text:p text:style-name="P35"/>
      <text:p text:style-name="P35">Партия №1.</text:p>
      <text:p text:style-name="P35"/>
      <text:p text:style-name="P47">4 <text:span text:style-name="T32">квадрат(а) размером 1.</text:span></text:p>
      <text:p text:style-name="P35">1 квадрат(а) размер 2.</text:p>
      <text:p text:style-name="P35"/>
      <text:p text:style-name="P35">Партия №2.</text:p>
      <text:p text:style-name="P35"/>
      <text:p text:style-name="P35">Нет составленных квадратов.</text:p>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1"><draw:frame draw:style-name="fr2" draw:name="Изображение2" text:anchor-type="paragraph" svg:x="-0.46cm" svg:y="0.026cm" svg:width="9.204cm" svg:height="25.104cm" draw:z-index="1"><draw:image xlink:href="Pictures/10000000000004B000000EAFC32FB404A930C653.bmp" xlink:type="simple" xlink:show="embed" xlink:actuate="onLoad"/></draw:frame><text:soft-page-break/>Схема программы.</text:p>
      <text:p text:style-name="P5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53">Описание программы.</text:p>
      <text:p text:style-name="P54"/>
      <text:p text:style-name="P40"><text:span text:style-name="T46">Данная программа оснащена простейшим графическим интерфейсом. Для создания окна в виде меню, мы используем библиотеку </text:span><text:span text:style-name="T30">tkinter. </text:span><text:span text:style-name="T46">Меню запускается во время старта программы и продолжает «существовать» вплоть до его закрытия. В меню есть 4 кнопки: <text:line-break/>1. «Запуск программы» — при нажатии на эту кнопку начинается непосредственно подсчёт квадратов для каждой игровой партии. Так же, предусмотрен графический вывод игрового поля. Примечание: для того чтобы подсчёт начался, нужно, чтобы для программы был выбран текстовый файл для работы.</text:span></text:p>
      <text:p text:style-name="P43">2. «Выбор текстового файла для работы» — эта кнопка позволяет выбрать текстовый файл. При выборе не текстового файла, программа предупредит пользователя.</text:p>
      <text:p text:style-name="P44">3. «О программе» - по нажатию данной кнопки пользователю приводится краткая информация о программе.</text:p>
      <text:p text:style-name="P41"><text:span text:style-name="T47">4. «Выход» - выход из программы и закрытие меню. </text:span><text:line-break/>Программа на вход принимает строки из файла. <text:span text:style-name="T46">Первые две строки содержат информацию о партии, первая — размер игрового поля, вторая — количество соединяющих линий. На основе этой информации, создается матрица нулей, которую в дальнейшем мы будем заполнять в зависимости от последующих считанных строк. Ко всему этому, мы создаём пустой список, в который будем хранить результаты подсчётов для вывода. Если считываемая строка начинается с </text:span><text:span text:style-name="T31">H, </text:span><text:span text:style-name="T47">что означает горизонтальную линию, то мы прибавляем к матрице с заданными индексами «точки» число два. Если же </text:span><text:span text:style-name="T31">V, </text:span><text:span text:style-name="T47">то прибавляем единицу. Таким образом, после полного заполнения матрицы, программа имеет несколько элементов значение которых равно трём. Только из таких «точек» игрового поля (то бишь элементов матрицы) можно образовать квадрат. Такая точка будет служить нам левым верхним углом квадрата. Безусловно, не из каждой такой «точки» можно составить хотя бы один квадрат. Далее программа проходит каждый элемент. Если элемент равен трём, то начинается подсчётов возможных квадратов, выходящих из этой «точки». Алгоритм подсчёта прост:</text:span></text:p>
      <text:p text:style-name="P45">1. Программа вычисляет максимально возможный размер квадрата, выходящего из этой «точки», путём выбора количества минимального из двух: количества строк до конца матрицы от этой точки; количества столбцов до конца матрицы от этой точки.</text:p>
      <text:p text:style-name="P42">2. Полученный размер — число повторений цикла. Сначала в цикле проверяется наличия квадрата размером 1, 2 … и так далее до максимально полученного размера.</text:p>
      <text:p text:style-name="P42">3. В цикле проверяется наличие 4 сторон квадрата путём обращения к другим элементам матрицы. Например: для того, чтобы существовала верхняя горизонтальная сторона квадрата, нужно чтобы все элементы <text:s/>от текущего до размера проверяемого квадрата (по индексу <text:span text:style-name="T27">i) </text:span>были более либо равным двум, т. к. это означает что в этих «точках» матрицы проведена как минимум горизонтальная линия.<text:line-break/>4. После каждой итерации цикла добавляется результат подсчёта в список.</text:p>
      <text:p text:style-name="P31"><text:span text:style-name="T4">Так же, во время «прохода» по каждому элементу матрицы, программа «рисует» линии и точки на экране с помощью виджета </text:span><text:span text:style-name="T7">Canvas. </text:span><text:span text:style-name="T27">«</text:span><text:span text:style-name="T4">Вырисовка» линий и точек идёт так же с помощью значений содержащихся в каждом элементе матрицы.</text:span></text:p>
      <text:p text:style-name="P42">После этого программа выводит данные <text:span text:style-name="T48">о подсчитанных квадратах </text:span>на экран. <text:span text:style-name="T48">По нажатию кнопки «Следующая партия», весь алгоритм, описанный выше, повторяется снова. Если же файл закончился, то кнопки «Следующая партия» не появляется.</text:span></text:p>
      <text:p text:style-name="P34"/>
      <text:p text:style-name="P34"/>
      <text:p text:style-name="P34"/>
      <text:p text:style-name="P34"/>
      <text:p text:style-name="P34"/>
      <text:p text:style-name="P55"/>
      <text:p text:style-name="P52"><text:soft-page-break/><text:span text:style-name="T40">Текст</text:span><text:span text:style-name="T39"> программы с комментариями.</text:span></text:p>
      <text:p text:style-name="P46"/>
      <text:p text:style-name="P46"/>
      <text:p text:style-name="P39"><text:span text:style-name="T37">from </text:span><text:span text:style-name="T38">tkinter </text:span><text:span text:style-name="T37">import </text:span><text:span text:style-name="T38">*</text:span><text:line-break/><text:span text:style-name="T37">from </text:span><text:span text:style-name="T38">tkinter </text:span><text:span text:style-name="T37">import </text:span><text:span text:style-name="T38">filedialog </text:span><text:span text:style-name="T37">as </text:span><text:span text:style-name="T38">fd</text:span><text:line-break/><text:span text:style-name="T37">from </text:span><text:span text:style-name="T38">tkinter </text:span><text:span text:style-name="T37">import </text:span><text:span text:style-name="T38">messagebox </text:span><text:span text:style-name="T37">as </text:span><text:span text:style-name="T38">mb</text:span><text:line-break/><text:line-break/><text:span text:style-name="T38">'''</text:span><text:line-break/><text:line-break/><text:span text:style-name="T38">****** Вывод результатов подсчёта ******</text:span><text:line-break/><text:line-break/><text:span text:style-name="T38">Функция info_about_game получает список с данными количества квадратов</text:span><text:line-break/><text:span text:style-name="T38">и их размере, и выводит их.</text:span><text:line-break/><text:line-break/><text:span text:style-name="T38">* Обозначение переменных:</text:span><text:line-break/><text:span text:style-name="T38">numb_of_game - номер текущей партии. count_squares_total - подсчёт общего кол-ва</text:span><text:line-break/><text:span text:style-name="T38">квадратов; string_with_info - строка содержащая всю информацию о текущей партии.</text:span><text:line-break/><text:line-break/><text:span text:style-name="T38">'''</text:span><text:line-break/><text:line-break/><text:line-break/><text:span text:style-name="T37">def </text:span><text:span text:style-name="T38">info_about_game(</text:span><text:span text:style-name="T37">count_of_squares</text:span><text:span text:style-name="T38">, </text:span><text:span text:style-name="T37">canvas</text:span><text:span text:style-name="T38">, </text:span><text:span text:style-name="T37">info</text:span><text:span text:style-name="T38">):</text:span><text:line-break/><text:span text:style-name="T38"> <text:s text:c="3"/></text:span><text:span text:style-name="T37">global </text:span><text:span text:style-name="T38">numb_of_game</text:span><text:line-break/><text:span text:style-name="T38"> <text:s text:c="3"/>numb_of_game += 1</text:span><text:line-break/><text:span text:style-name="T38"> <text:s text:c="3"/>count_squares_total = 0</text:span><text:line-break/><text:span text:style-name="T38"> <text:s text:c="3"/>string_with_info = ' <text:s text:c="4"/>Партия № ' + str(numb_of_game) + <text:s/>'\n\n'</text:span><text:line-break/><text:span text:style-name="T38"> <text:s text:c="3"/></text:span><text:span text:style-name="T37">for </text:span><text:span text:style-name="T38">i </text:span><text:span text:style-name="T37">in </text:span><text:span text:style-name="T38">range(len(</text:span><text:span text:style-name="T37">count_of_squares</text:span><text:span text:style-name="T38">)):</text:span><text:line-break/><text:span text:style-name="T38"> <text:s text:c="7"/></text:span><text:span text:style-name="T37">if count_of_squares</text:span><text:span text:style-name="T38">[i] != 0:</text:span><text:line-break/><text:span text:style-name="T38"> <text:s text:c="11"/>count_squares_total += 1</text:span><text:line-break/><text:span text:style-name="T38"> <text:s text:c="11"/>string_with_info += str(</text:span><text:span text:style-name="T37">count_of_squares</text:span><text:span text:style-name="T38">[i]) \</text:span><text:line-break/><text:span text:style-name="T38"> <text:s text:c="31"/>+ ' квадрат(а) размером ' + str(i + 1) + '\n'</text:span><text:line-break/><text:span text:style-name="T38"> <text:s text:c="3"/></text:span><text:span text:style-name="T37">if </text:span><text:span text:style-name="T38">count_squares_total == 0:</text:span><text:line-break/><text:span text:style-name="T38"> <text:s text:c="7"/>string_with_info += 'Нет составленных квадратов'</text:span><text:line-break/><text:span text:style-name="T38"> <text:s text:c="3"/></text:span><text:span text:style-name="T37">info</text:span><text:span text:style-name="T38">['text'] = string_with_info</text:span><text:line-break/><text:line-break/><text:line-break/><text:span text:style-name="T38">'''' </text:span><text:line-break/><text:line-break/><text:span text:style-name="T38">****** Построение линий на игровом поле *******</text:span><text:line-break/><text:line-break/><text:span text:style-name="T38">*** Функции:</text:span><text:line-break/><text:line-break/><text:span text:style-name="T38">1. drawing</text:span><text:line-break/><text:span text:style-name="T38">Функция отвечающая за вывод и построений на игровом поле.</text:span><text:line-break/><text:span text:style-name="T38">В функцию передаётся ключ-значение матрицы, от которого зависит,</text:span><text:line-break/><text:span text:style-name="T38">какая функция будет вызвана в дальнейшем (ф-ции 2-4)</text:span><text:line-break/><text:line-break/><text:span text:style-name="T38">* Обозначение переменных:</text:span><text:line-break/><text:span text:style-name="T38">canvas - полотно; i, j - координаты точки из которой будет рисоваться</text:span><text:line-break/><text:span text:style-name="T38">линия / точка. LINE_SIZE - размер линий.</text:span><text:line-break/><text:line-break/><text:soft-page-break/><text:span text:style-name="T38">2. points</text:span><text:line-break/><text:span text:style-name="T38">Построение точек на игровом поле (в виде квадрата)</text:span><text:line-break/><text:line-break/><text:span text:style-name="T38">3. horizintal_line</text:span><text:line-break/><text:span text:style-name="T38">Построение горизонатльных линий на игровом поле</text:span><text:line-break/><text:line-break/><text:span text:style-name="T38">4. verticale_line</text:span><text:line-break/><text:span text:style-name="T38">Построение вертикальных линий на игровом поле</text:span><text:line-break/><text:line-break/><text:span text:style-name="T38">'''</text:span><text:line-break/><text:line-break/><text:span text:style-name="T37">def </text:span><text:span text:style-name="T38">points(</text:span><text:span text:style-name="T37">canvas</text:span><text:span text:style-name="T38">, </text:span><text:span text:style-name="T37">LINE_SIZE</text:span><text:span text:style-name="T38">, </text:span><text:span text:style-name="T37">i</text:span><text:span text:style-name="T38">, </text:span><text:span text:style-name="T37">j</text:span><text:span text:style-name="T38">):</text:span><text:line-break/><text:span text:style-name="T38"> <text:s text:c="3"/></text:span><text:span text:style-name="T37">canvas</text:span><text:span text:style-name="T38">.create_rectangle(</text:span><text:span text:style-name="T37">j </text:span><text:span text:style-name="T38">* </text:span><text:span text:style-name="T37">LINE_SIZE </text:span><text:span text:style-name="T38">- 3, </text:span><text:span text:style-name="T37">i </text:span><text:span text:style-name="T38">* </text:span><text:span text:style-name="T37">LINE_SIZE </text:span><text:span text:style-name="T38">- 3, \</text:span><text:line-break/><text:span text:style-name="T38"> <text:s text:c="27"/></text:span><text:span text:style-name="T37">j </text:span><text:span text:style-name="T38">* </text:span><text:span text:style-name="T37">LINE_SIZE </text:span><text:span text:style-name="T38">+ 3, </text:span><text:span text:style-name="T37">i </text:span><text:span text:style-name="T38">* </text:span><text:span text:style-name="T37">LINE_SIZE </text:span><text:span text:style-name="T38">+ 3, \</text:span><text:line-break/><text:span text:style-name="T38"> <text:s text:c="27"/>fill="black", width=3)</text:span><text:line-break/><text:line-break/><text:line-break/><text:span text:style-name="T37">def </text:span><text:span text:style-name="T38">horizontal_line(</text:span><text:span text:style-name="T37">canvas</text:span><text:span text:style-name="T38">, </text:span><text:span text:style-name="T37">LINE_SIZE</text:span><text:span text:style-name="T38">, </text:span><text:span text:style-name="T37">i</text:span><text:span text:style-name="T38">, </text:span><text:span text:style-name="T37">j</text:span><text:span text:style-name="T38">):</text:span><text:line-break/><text:span text:style-name="T38"> <text:s text:c="3"/></text:span><text:span text:style-name="T37">canvas</text:span><text:span text:style-name="T38">.create_line(</text:span><text:span text:style-name="T37">j </text:span><text:span text:style-name="T38">* </text:span><text:span text:style-name="T37">LINE_SIZE</text:span><text:span text:style-name="T38">, </text:span><text:span text:style-name="T37">i </text:span><text:span text:style-name="T38">* </text:span><text:span text:style-name="T37">LINE_SIZE</text:span><text:span text:style-name="T38">, </text:span><text:span text:style-name="T37">LINE_SIZE </text:span><text:span text:style-name="T38">* </text:span><text:span text:style-name="T37">j </text:span><text:span text:style-name="T38">+ </text:span><text:span text:style-name="T37">LINE_SIZE</text:span><text:span text:style-name="T38">, \</text:span><text:line-break/><text:span text:style-name="T38"> <text:s text:c="22"/></text:span><text:span text:style-name="T37">i </text:span><text:span text:style-name="T38">* </text:span><text:span text:style-name="T37">LINE_SIZE</text:span><text:span text:style-name="T38">, width=5, fill='blue')</text:span><text:line-break/><text:line-break/><text:line-break/><text:span text:style-name="T37">def </text:span><text:span text:style-name="T38">vertical_line(</text:span><text:span text:style-name="T37">canvas</text:span><text:span text:style-name="T38">, </text:span><text:span text:style-name="T37">LINE_SIZE</text:span><text:span text:style-name="T38">, </text:span><text:span text:style-name="T37">i</text:span><text:span text:style-name="T38">, </text:span><text:span text:style-name="T37">j</text:span><text:span text:style-name="T38">):</text:span><text:line-break/><text:span text:style-name="T38"> <text:s text:c="3"/></text:span><text:span text:style-name="T37">canvas</text:span><text:span text:style-name="T38">.create_line(</text:span><text:span text:style-name="T37">j </text:span><text:span text:style-name="T38">* </text:span><text:span text:style-name="T37">LINE_SIZE</text:span><text:span text:style-name="T38">, </text:span><text:span text:style-name="T37">i </text:span><text:span text:style-name="T38">* </text:span><text:span text:style-name="T37">LINE_SIZE</text:span><text:span text:style-name="T38">, </text:span><text:span text:style-name="T37">LINE_SIZE </text:span><text:span text:style-name="T38">* </text:span><text:span text:style-name="T37">j</text:span><text:span text:style-name="T38">, \</text:span><text:line-break/><text:span text:style-name="T38"> <text:s text:c="22"/></text:span><text:span text:style-name="T37">i </text:span><text:span text:style-name="T38">* </text:span><text:span text:style-name="T37">LINE_SIZE </text:span><text:span text:style-name="T38">+ </text:span><text:span text:style-name="T37">LINE_SIZE</text:span><text:span text:style-name="T38">, width=5, fill='blue')</text:span><text:line-break/><text:line-break/><text:line-break/><text:span text:style-name="T37">def </text:span><text:span text:style-name="T38">drawing(</text:span><text:span text:style-name="T37">matrix</text:span><text:span text:style-name="T38">, </text:span><text:span text:style-name="T37">canvas</text:span><text:span text:style-name="T38">, </text:span><text:span text:style-name="T37">i</text:span><text:span text:style-name="T38">, </text:span><text:span text:style-name="T37">j</text:span><text:span text:style-name="T38">):</text:span><text:line-break/><text:span text:style-name="T38"> <text:s text:c="3"/>key = </text:span><text:span text:style-name="T37">matrix</text:span><text:span text:style-name="T38">[</text:span><text:span text:style-name="T37">i</text:span><text:span text:style-name="T38">][</text:span><text:span text:style-name="T37">j</text:span><text:span text:style-name="T38">]</text:span><text:line-break/><text:span text:style-name="T38"> <text:s text:c="3"/></text:span><text:span text:style-name="T37">i </text:span><text:span text:style-name="T38">+= 0.5;</text:span><text:line-break/><text:span text:style-name="T38"> <text:s text:c="3"/></text:span><text:span text:style-name="T37">j </text:span><text:span text:style-name="T38">+= 0.5</text:span><text:line-break/><text:line-break/><text:span text:style-name="T38"> <text:s text:c="3"/># Размер линий зависит от размера игрового поля:</text:span><text:line-break/><text:span text:style-name="T38"> <text:s text:c="3"/></text:span><text:span text:style-name="T37">if </text:span><text:span text:style-name="T38">len(</text:span><text:span text:style-name="T37">matrix</text:span><text:span text:style-name="T38">) &gt;= 7:</text:span><text:line-break/><text:span text:style-name="T38"> <text:s text:c="7"/>LINE_SIZE = 50</text:span><text:line-break/><text:span text:style-name="T38"> <text:s text:c="3"/></text:span><text:span text:style-name="T37">elif </text:span><text:span text:style-name="T38">len(</text:span><text:span text:style-name="T37">matrix</text:span><text:span text:style-name="T38">) &gt;= 4:</text:span><text:line-break/><text:span text:style-name="T38"> <text:s text:c="7"/>LINE_SIZE = 90</text:span><text:line-break/><text:span text:style-name="T38"> <text:s text:c="3"/></text:span><text:span text:style-name="T37">else</text:span><text:span text:style-name="T38">:</text:span><text:line-break/><text:span text:style-name="T38"> <text:s text:c="7"/>LINE_SIZE = 110</text:span><text:line-break/><text:line-break/><text:span text:style-name="T38"> <text:s text:c="3"/># Вывод линий и точек:</text:span><text:line-break/><text:span text:style-name="T38"> <text:s text:c="3"/></text:span><text:span text:style-name="T37">if </text:span><text:span text:style-name="T38">key == 3:</text:span><text:line-break/><text:span text:style-name="T38"> <text:s text:c="7"/>horizontal_line(</text:span><text:span text:style-name="T37">canvas</text:span><text:span text:style-name="T38">, LINE_SIZE, </text:span><text:span text:style-name="T37">i</text:span><text:span text:style-name="T38">, </text:span><text:span text:style-name="T37">j</text:span><text:span text:style-name="T38">)</text:span><text:line-break/><text:span text:style-name="T38"> <text:s text:c="7"/>vertical_line(</text:span><text:span text:style-name="T37">canvas</text:span><text:span text:style-name="T38">, LINE_SIZE, </text:span><text:span text:style-name="T37">i</text:span><text:span text:style-name="T38">, </text:span><text:span text:style-name="T37">j</text:span><text:span text:style-name="T38">)</text:span><text:line-break/><text:span text:style-name="T38"> <text:s text:c="7"/>points(</text:span><text:span text:style-name="T37">canvas</text:span><text:span text:style-name="T38">, LINE_SIZE, </text:span><text:span text:style-name="T37">i</text:span><text:span text:style-name="T38">, </text:span><text:span text:style-name="T37">j</text:span><text:span text:style-name="T38">)</text:span><text:line-break/><text:span text:style-name="T38"> <text:s text:c="3"/></text:span><text:span text:style-name="T37">elif </text:span><text:span text:style-name="T38">key == 2:</text:span><text:line-break/><text:span text:style-name="T38"> <text:s text:c="7"/>horizontal_line(</text:span><text:span text:style-name="T37">canvas</text:span><text:span text:style-name="T38">, LINE_SIZE, </text:span><text:span text:style-name="T37">i</text:span><text:span text:style-name="T38">, </text:span><text:span text:style-name="T37">j</text:span><text:span text:style-name="T38">)</text:span><text:line-break/><text:span text:style-name="T38"> <text:s text:c="7"/>points(</text:span><text:span text:style-name="T37">canvas</text:span><text:span text:style-name="T38">, LINE_SIZE, </text:span><text:span text:style-name="T37">i</text:span><text:span text:style-name="T38">, </text:span><text:span text:style-name="T37">j</text:span><text:span text:style-name="T38">)</text:span><text:line-break/><text:span text:style-name="T38"> <text:s text:c="3"/></text:span><text:span text:style-name="T37">elif </text:span><text:span text:style-name="T38">key == 1:</text:span><text:line-break/><text:span text:style-name="T38"> <text:s text:c="7"/>vertical_line(</text:span><text:span text:style-name="T37">canvas</text:span><text:span text:style-name="T38">, LINE_SIZE, </text:span><text:span text:style-name="T37">i</text:span><text:span text:style-name="T38">, </text:span><text:span text:style-name="T37">j</text:span><text:span text:style-name="T38">)</text:span><text:line-break/><text:span text:style-name="T38"> <text:s text:c="7"/>points(</text:span><text:span text:style-name="T37">canvas</text:span><text:span text:style-name="T38">, LINE_SIZE, </text:span><text:span text:style-name="T37">i</text:span><text:span text:style-name="T38">, </text:span><text:span text:style-name="T37">j</text:span><text:span text:style-name="T38">)</text:span><text:line-break/><text:span text:style-name="T38"> <text:s text:c="3"/></text:span><text:span text:style-name="T37">else</text:span><text:span text:style-name="T38">:</text:span><text:line-break/><text:soft-page-break/><text:span text:style-name="T38"> <text:s text:c="7"/>points(</text:span><text:span text:style-name="T37">canvas</text:span><text:span text:style-name="T38">, LINE_SIZE, </text:span><text:span text:style-name="T37">i</text:span><text:span text:style-name="T38">, </text:span><text:span text:style-name="T37">j</text:span><text:span text:style-name="T38">)</text:span><text:line-break/><text:line-break/><text:line-break/><text:span text:style-name="T38">'''</text:span><text:line-break/><text:line-break/><text:span text:style-name="T38">****** Запись и обработка матрицы. Подсчёт квадратов. *******</text:span><text:line-break/><text:line-break/><text:span text:style-name="T38">*** Функции:</text:span><text:line-break/><text:line-break/><text:span text:style-name="T38">1. matrix_fill</text:span><text:line-break/><text:span text:style-name="T38">Заполнение матрицы. Если из условной точки игрового поля (матрицы)</text:span><text:line-break/><text:span text:style-name="T38">проведена горизонтальная линия - то прибавляем к данной точке два.</text:span><text:line-break/><text:span text:style-name="T38">Если вертикальная - еденицу. Таким образом, точки из которых </text:span><text:line-break/><text:span text:style-name="T38">проведены две линии, будут иметь значение трёх. Точки из которых</text:span><text:line-break/><text:span text:style-name="T38">нет линий, будут иметь значение ноль.</text:span><text:line-break/><text:line-break/><text:span text:style-name="T38">* Обозначение переменных:</text:span><text:line-break/><text:span text:style-name="T38">num - переменная содержит положение линии (вертикальное или горизонтальное)</text:span><text:line-break/><text:span text:style-name="T38">i, j - координаты точки, из которой проведена линия.</text:span><text:line-break/><text:line-break/><text:span text:style-name="T38">2. pass_matrix</text:span><text:line-break/><text:span text:style-name="T38">Прохождение каждого элемента матрицы. Для каждого элемента запускается</text:span><text:line-break/><text:span text:style-name="T38">ф-ция drawing (описание см. выше). Если значение элемента равно трём,</text:span><text:line-break/><text:span text:style-name="T38">запускает функция square_count (описание см. ниже). Т.к. квадрат</text:span><text:line-break/><text:span text:style-name="T38">может быть образован только из точки, из которой выходит вертикальная</text:span><text:line-break/><text:span text:style-name="T38">и горизонтальная линия, то есть значение элемента этой точки равно</text:span><text:line-break/><text:span text:style-name="T38">трём.</text:span><text:line-break/><text:line-break/><text:span text:style-name="T38">3. square_count.</text:span><text:line-break/><text:span text:style-name="T38">Из просматриваемой точки (координаты передаются из ф-ции pass_matrix)</text:span><text:line-break/><text:span text:style-name="T38">проверяются наличие сторон, которые должны образовывать квадрат (на 4-х измерениях):</text:span><text:line-break/><text:span text:style-name="T38">1) Верхняя горизонатль; 2) Нижняя горизонатль</text:span><text:line-break/><text:span text:style-name="T38">3) Левая вертикаль; 4) Правая вертикаль</text:span><text:line-break/><text:span text:style-name="T38">Каждый раз проходим эти 4 измерения от начальной координаты, начиная с размера</text:span><text:line-break/><text:span text:style-name="T38">квадрата 1, 2 ... до максимально возможного размера квадрата</text:span><text:line-break/><text:span text:style-name="T38">Максимальная сторона вычислеяется в переменной max_square(). Если квадрат не</text:span><text:line-break/><text:span text:style-name="T38">образуется - переходим к проверке квадрата с размером + 1.</text:span><text:line-break/><text:line-break/><text:span text:style-name="T38">* Обозначение переменных:</text:span><text:line-break/><text:span text:style-name="T38">i_pos, j_pos - начальные координаты точки, из которой проверяем наличие квадрата</text:span><text:line-break/><text:span text:style-name="T38">existence_square - переменная значением True / False в зависимости от наличии квадрата</text:span><text:line-break/><text:span text:style-name="T38">k - начало цикла просмотра наличие квадрата.</text:span><text:line-break/><text:line-break/><text:span text:style-name="T38">'''</text:span><text:line-break/><text:line-break/><text:span text:style-name="T37">def </text:span><text:span text:style-name="T38">square_count(</text:span><text:span text:style-name="T37">i_pos</text:span><text:span text:style-name="T38">, </text:span><text:span text:style-name="T37">j_pos</text:span><text:span text:style-name="T38">, </text:span><text:span text:style-name="T37">matrix</text:span><text:span text:style-name="T38">, </text:span><text:span text:style-name="T37">count_of_squares</text:span><text:span text:style-name="T38">):</text:span><text:line-break/><text:span text:style-name="T38"> <text:s text:c="3"/>existence_square = False</text:span><text:line-break/><text:span text:style-name="T38"> <text:s text:c="3"/>k = 0</text:span><text:line-break/><text:span text:style-name="T38"> <text:s text:c="3"/>max_square = min(len(</text:span><text:span text:style-name="T37">matrix</text:span><text:span text:style-name="T38">) - 1 - </text:span><text:span text:style-name="T37">i_pos</text:span><text:span text:style-name="T38">, len(</text:span><text:span text:style-name="T37">matrix</text:span><text:span text:style-name="T38">) - 1 - </text:span><text:span text:style-name="T37">j_pos</text:span><text:span text:style-name="T38">)</text:span><text:line-break/><text:span text:style-name="T38"> <text:s text:c="3"/></text:span><text:span text:style-name="T37">for </text:span><text:span text:style-name="T38">i </text:span><text:span text:style-name="T37">in </text:span><text:span text:style-name="T38">range(max_square):</text:span><text:line-break/><text:span text:style-name="T38"> <text:s text:c="7"/></text:span><text:span text:style-name="T37">for </text:span><text:span text:style-name="T38">j </text:span><text:span text:style-name="T37">in </text:span><text:span text:style-name="T38">range(k, i + 1):</text:span><text:line-break/><text:span text:style-name="T38"> <text:s text:c="11"/></text:span><text:line-break/><text:soft-page-break/><text:span text:style-name="T38"> <text:s text:c="11"/># Просмотр верхней горизонтали:</text:span><text:line-break/><text:span text:style-name="T38"> <text:s text:c="11"/></text:span><text:span text:style-name="T37">if matrix</text:span><text:span text:style-name="T38">[</text:span><text:span text:style-name="T37">i_pos</text:span><text:span text:style-name="T38">][</text:span><text:span text:style-name="T37">j_pos </text:span><text:span text:style-name="T38">+ j] &gt;= 2:</text:span><text:line-break/><text:span text:style-name="T38"> <text:s text:c="15"/></text:span><text:span text:style-name="T37">pass</text:span><text:line-break/><text:span text:style-name="T37"> <text:s text:c="11"/>else</text:span><text:span text:style-name="T38">:</text:span><text:line-break/><text:span text:style-name="T38"> <text:s text:c="15"/>existence_square = False</text:span><text:line-break/><text:span text:style-name="T38"> <text:s text:c="15"/></text:span><text:span text:style-name="T37">break</text:span><text:line-break/><text:line-break/><text:span text:style-name="T37"> <text:s text:c="11"/></text:span><text:span text:style-name="T38"># Просмотр правой вертикали:</text:span><text:line-break/><text:span text:style-name="T38"> <text:s text:c="11"/></text:span><text:span text:style-name="T37">if matrix</text:span><text:span text:style-name="T38">[</text:span><text:span text:style-name="T37">i_pos </text:span><text:span text:style-name="T38">+ j][</text:span><text:span text:style-name="T37">j_pos </text:span><text:span text:style-name="T38">+ i + 1] == 1 \</text:span><text:line-break/><text:span text:style-name="T38"> <text:s text:c="19"/></text:span><text:span text:style-name="T37">or matrix</text:span><text:span text:style-name="T38">[</text:span><text:span text:style-name="T37">i_pos </text:span><text:span text:style-name="T38">+ j][</text:span><text:span text:style-name="T37">j_pos </text:span><text:span text:style-name="T38">+ i + 1] == 3:</text:span><text:line-break/><text:span text:style-name="T38"> <text:s text:c="15"/></text:span><text:span text:style-name="T37">pass</text:span><text:line-break/><text:span text:style-name="T37"> <text:s text:c="11"/>else</text:span><text:span text:style-name="T38">:</text:span><text:line-break/><text:span text:style-name="T38"> <text:s text:c="15"/>existence_square = False</text:span><text:line-break/><text:span text:style-name="T38"> <text:s text:c="15"/></text:span><text:span text:style-name="T37">break</text:span><text:line-break/><text:line-break/><text:span text:style-name="T37"> <text:s text:c="11"/></text:span><text:span text:style-name="T38"># Просмотр нижней горизонатли:</text:span><text:line-break/><text:span text:style-name="T38"> <text:s text:c="11"/></text:span><text:span text:style-name="T37">if matrix</text:span><text:span text:style-name="T38">[</text:span><text:span text:style-name="T37">i_pos </text:span><text:span text:style-name="T38">+ i + 1][</text:span><text:span text:style-name="T37">j_pos </text:span><text:span text:style-name="T38">+ j] &gt;= 2:</text:span><text:line-break/><text:span text:style-name="T38"> <text:s text:c="15"/></text:span><text:span text:style-name="T37">pass</text:span><text:line-break/><text:span text:style-name="T37"> <text:s text:c="11"/>else</text:span><text:span text:style-name="T38">:</text:span><text:line-break/><text:span text:style-name="T38"> <text:s text:c="15"/>existence_square = False</text:span><text:line-break/><text:span text:style-name="T38"> <text:s text:c="15"/></text:span><text:span text:style-name="T37">break</text:span><text:line-break/><text:line-break/><text:span text:style-name="T37"> <text:s text:c="11"/></text:span><text:span text:style-name="T38"># Просмотр левой вертекали:</text:span><text:line-break/><text:span text:style-name="T38"> <text:s text:c="11"/></text:span><text:span text:style-name="T37">if matrix</text:span><text:span text:style-name="T38">[</text:span><text:span text:style-name="T37">i_pos </text:span><text:span text:style-name="T38">+ j][</text:span><text:span text:style-name="T37">j_pos</text:span><text:span text:style-name="T38">] == 1 </text:span><text:span text:style-name="T37">or matrix</text:span><text:span text:style-name="T38">[</text:span><text:span text:style-name="T37">i_pos </text:span><text:span text:style-name="T38">+ j][</text:span><text:span text:style-name="T37">j_pos</text:span><text:span text:style-name="T38">] == 3:</text:span><text:line-break/><text:span text:style-name="T38"> <text:s text:c="15"/>existence_square = True</text:span><text:line-break/><text:span text:style-name="T38"> <text:s text:c="11"/></text:span><text:span text:style-name="T37">else</text:span><text:span text:style-name="T38">:</text:span><text:line-break/><text:span text:style-name="T38"> <text:s text:c="15"/>existence_square = False</text:span><text:line-break/><text:span text:style-name="T38"> <text:s text:c="15"/></text:span><text:span text:style-name="T37">break</text:span><text:line-break/><text:span text:style-name="T37"> <text:s text:c="11"/></text:span><text:span text:style-name="T38">k += 1</text:span><text:line-break/><text:span text:style-name="T38"> <text:s text:c="11"/></text:span><text:line-break/><text:span text:style-name="T38"> <text:s text:c="7"/># Прибавление квадрата, если он прошёл все проверки:</text:span><text:line-break/><text:span text:style-name="T38"> <text:s text:c="7"/></text:span><text:span text:style-name="T37">if </text:span><text:span text:style-name="T38">existence_square == True:</text:span><text:line-break/><text:span text:style-name="T38"> <text:s text:c="11"/></text:span><text:span text:style-name="T37">count_of_squares</text:span><text:span text:style-name="T38">[i] += 1</text:span><text:line-break/><text:line-break/><text:line-break/><text:span text:style-name="T37">def </text:span><text:span text:style-name="T38">matrix_fill(</text:span><text:span text:style-name="T37">lines_count</text:span><text:span text:style-name="T38">, </text:span><text:span text:style-name="T37">infile</text:span><text:span text:style-name="T38">, </text:span><text:span text:style-name="T37">matrix</text:span><text:span text:style-name="T38">):</text:span><text:line-break/><text:span text:style-name="T38"> <text:s text:c="3"/></text:span><text:span text:style-name="T37">for </text:span><text:span text:style-name="T38">k </text:span><text:span text:style-name="T37">in </text:span><text:span text:style-name="T38">range(</text:span><text:span text:style-name="T37">lines_count</text:span><text:span text:style-name="T38">):</text:span><text:line-break/><text:span text:style-name="T38"> <text:s text:c="7"/></text:span><text:span text:style-name="T37">try</text:span><text:span text:style-name="T38">:</text:span><text:line-break/><text:span text:style-name="T38"> <text:s text:c="11"/>num, i, j = </text:span><text:span text:style-name="T37">infile</text:span><text:span text:style-name="T38">.readline().split()</text:span><text:line-break/><text:span text:style-name="T38"> <text:s text:c="7"/></text:span><text:span text:style-name="T37">except </text:span><text:span text:style-name="T38">ValueError:</text:span><text:line-break/><text:span text:style-name="T38"> <text:s text:c="11"/></text:span><text:span text:style-name="T37">continue</text:span><text:line-break/><text:span text:style-name="T37"> <text:s text:c="7"/></text:span><text:span text:style-name="T38">i, j = int(i) - 1, int(j) - 1</text:span><text:line-break/><text:span text:style-name="T38"> <text:s text:c="7"/></text:span><text:span text:style-name="T37">if </text:span><text:span text:style-name="T38">num == 'H':</text:span><text:line-break/><text:span text:style-name="T38"> <text:s text:c="11"/></text:span><text:span text:style-name="T37">matrix</text:span><text:span text:style-name="T38">[i][j] += 2</text:span><text:line-break/><text:span text:style-name="T38"> <text:s text:c="7"/></text:span><text:span text:style-name="T37">else</text:span><text:span text:style-name="T38">:</text:span><text:line-break/><text:span text:style-name="T38"> <text:s text:c="11"/></text:span><text:span text:style-name="T37">matrix</text:span><text:span text:style-name="T38">[j][i] += 1</text:span><text:line-break/><text:line-break/><text:line-break/><text:span text:style-name="T37">def </text:span><text:span text:style-name="T38">pass_matrix(</text:span><text:span text:style-name="T37">matrix</text:span><text:span text:style-name="T38">, </text:span><text:span text:style-name="T37">count_of_squares</text:span><text:span text:style-name="T38">, </text:span><text:span text:style-name="T37">canvas</text:span><text:span text:style-name="T38">):</text:span><text:line-break/><text:span text:style-name="T38"> <text:s text:c="3"/></text:span><text:span text:style-name="T37">for </text:span><text:span text:style-name="T38">i </text:span><text:span text:style-name="T37">in </text:span><text:span text:style-name="T38">range(len(</text:span><text:span text:style-name="T37">matrix</text:span><text:span text:style-name="T38">)):</text:span><text:line-break/><text:span text:style-name="T38"> <text:s text:c="7"/></text:span><text:span text:style-name="T37">for </text:span><text:span text:style-name="T38">j </text:span><text:span text:style-name="T37">in </text:span><text:span text:style-name="T38">range(len(</text:span><text:span text:style-name="T37">matrix</text:span><text:span text:style-name="T38">)):</text:span><text:line-break/><text:span text:style-name="T38"> <text:s text:c="11"/>drawing(</text:span><text:span text:style-name="T37">matrix</text:span><text:span text:style-name="T38">, </text:span><text:span text:style-name="T37">canvas</text:span><text:span text:style-name="T38">, i, j)</text:span><text:line-break/><text:soft-page-break/><text:span text:style-name="T38"> <text:s text:c="11"/></text:span><text:span text:style-name="T37">if matrix</text:span><text:span text:style-name="T38">[i][j] == 3 </text:span><text:span text:style-name="T37">and </text:span><text:span text:style-name="T38">i != len(</text:span><text:span text:style-name="T37">matrix</text:span><text:span text:style-name="T38">) - 1 </text:span><text:span text:style-name="T37">and </text:span><text:span text:style-name="T38">j != len(</text:span><text:span text:style-name="T37">matrix</text:span><text:span text:style-name="T38">) - 1:</text:span><text:line-break/><text:span text:style-name="T38"> <text:s text:c="15"/>square_count(i, j, </text:span><text:span text:style-name="T37">matrix</text:span><text:span text:style-name="T38">, </text:span><text:span text:style-name="T37">count_of_squares</text:span><text:span text:style-name="T38">)</text:span><text:line-break/><text:line-break/><text:line-break/><text:span text:style-name="T38">'''</text:span><text:line-break/><text:line-break/><text:span text:style-name="T38">****** Создание игрового поля и запуск функции подсчёта квадратов ******</text:span><text:line-break/><text:span text:style-name="T38">*** Функции: </text:span><text:line-break/><text:line-break/><text:span text:style-name="T38">1. main</text:span><text:line-break/><text:span text:style-name="T38">Данный блок программы срабатывает при нажатии клавиши "Запуск программы".</text:span><text:line-break/><text:span text:style-name="T38">Создаётся новое окно, которое визуализирует задачу и выводит результаты ее выполнения.</text:span><text:line-break/><text:span text:style-name="T38">После создания окна запускается функция one_game - обработка одной партии.</text:span><text:line-break/><text:line-break/><text:span text:style-name="T38">* Обозначение переменных:</text:span><text:line-break/><text:line-break/><text:span text:style-name="T38">numb_of_game - номер партии. infile - текстовый файл</text:span><text:line-break/><text:span text:style-name="T38">file_name, root - название текстового файла и корневого окна.</text:span><text:line-break/><text:span text:style-name="T38">* Настройки root_son:</text:span><text:line-break/><text:span text:style-name="T38">root_son - новое окно; geomethry, title <text:s/>- размер и название окна.</text:span><text:line-break/><text:span text:style-name="T38">maxsize, minsize - макс. и мин. размер окна.</text:span><text:line-break/><text:span text:style-name="T38">canvas - игровое поле; info - текст. информация о партии </text:span><text:line-break/><text:line-break/><text:span text:style-name="T38">2</text:span><text:span text:style-name="T41">.</text:span><text:span text:style-name="T38"> one_game</text:span><text:line-break/><text:span text:style-name="T38">Одна из ключевых функций, запускающая обработку одной партии.</text:span><text:line-break/><text:span text:style-name="T38">Вызывает сама себя при нажатии кнопки "Следующая партия",</text:span><text:line-break/><text:span text:style-name="T38">которую сама и создаёт. Вызывает функции matrix_fill, </text:span><text:line-break/><text:span text:style-name="T38">pass_matrix, info_about (описание см. выше). </text:span><text:line-break/><text:line-break/><text:span text:style-name="T38">* Обозначение переменных: </text:span><text:line-break/><text:line-break/><text:span text:style-name="T38">line - текущая линия; numb_of_game - текущий номер партии.</text:span><text:line-break/><text:span text:style-name="T38">matrix, matrix_size - кв. матрица игрового поля и её размер</text:span><text:line-break/><text:span text:style-name="T38">count_of_squares - пустой список, в которой будут добавляться</text:span><text:line-break/><text:span text:style-name="T38">результаты подсчётов. lines_count - кол-во строк в партии.</text:span><text:line-break/><text:span text:style-name="T38">button_go_next - кнопка "Слеудщая партия". Вызывает эту же </text:span><text:line-break/><text:span text:style-name="T38">функцию one_game.</text:span><text:line-break/><text:line-break/><text:span text:style-name="T38">'''</text:span><text:line-break/><text:line-break/><text:span text:style-name="T37">def </text:span><text:span text:style-name="T38">one_game(</text:span><text:span text:style-name="T37">infile</text:span><text:span text:style-name="T38">, </text:span><text:span text:style-name="T37">canvas</text:span><text:span text:style-name="T38">, </text:span><text:span text:style-name="T37">info</text:span><text:span text:style-name="T38">, </text:span><text:span text:style-name="T37">root_son</text:span><text:span text:style-name="T38">, </text:span><text:span text:style-name="T37">button_go_next</text:span><text:span text:style-name="T38">=None):</text:span><text:line-break/><text:span text:style-name="T38"> <text:s text:c="3"/>''' Очищение игрового поля '''</text:span><text:line-break/><text:span text:style-name="T38"> <text:s text:c="3"/></text:span><text:span text:style-name="T37">canvas</text:span><text:span text:style-name="T38">.delete('all')</text:span><text:line-break/><text:span text:style-name="T38"> <text:s text:c="3"/>line = </text:span><text:span text:style-name="T37">infile</text:span><text:span text:style-name="T38">.readline()</text:span><text:line-break/><text:span text:style-name="T38"> <text:s text:c="3"/></text:span><text:span text:style-name="T37">while </text:span><text:span text:style-name="T38">line != '\n' </text:span><text:span text:style-name="T37">and </text:span><text:span text:style-name="T38">line != '':</text:span><text:line-break/><text:span text:style-name="T38"> <text:s text:c="7"/>matrix_size = int(line)</text:span><text:line-break/><text:span text:style-name="T38"> <text:s text:c="7"/>matrix = [[0] * matrix_size </text:span><text:span text:style-name="T37">for </text:span><text:span text:style-name="T38">i </text:span><text:span text:style-name="T37">in </text:span><text:span text:style-name="T38">range(matrix_size)]</text:span><text:line-break/><text:span text:style-name="T38"> <text:s text:c="7"/>count_of_squares = [0] * matrix_size</text:span><text:line-break/><text:span text:style-name="T38"> <text:s text:c="7"/>lines_count = int(</text:span><text:span text:style-name="T37">infile</text:span><text:span text:style-name="T38">.readline())</text:span><text:line-break/><text:line-break/><text:span text:style-name="T38"> <text:s text:c="7"/># Заполнение матрицы:</text:span><text:line-break/><text:span text:style-name="T38"> <text:s text:c="7"/>matrix_fill(lines_count, </text:span><text:span text:style-name="T37">infile</text:span><text:span text:style-name="T38">, matrix)</text:span><text:line-break/><text:soft-page-break/><text:span text:style-name="T38"> <text:s text:c="7"/># Просмотр заполненной матрицы:</text:span><text:line-break/><text:span text:style-name="T38"> <text:s text:c="7"/>pass_matrix(matrix, count_of_squares, </text:span><text:span text:style-name="T37">canvas</text:span><text:span text:style-name="T38">)</text:span><text:line-break/><text:span text:style-name="T38"> <text:s text:c="7"/># Вывод результатов</text:span><text:line-break/><text:span text:style-name="T38"> <text:s text:c="7"/>info_about_game(count_of_squares, </text:span><text:span text:style-name="T37">canvas</text:span><text:span text:style-name="T38">, </text:span><text:span text:style-name="T37">info</text:span><text:span text:style-name="T38">)</text:span><text:line-break/><text:span text:style-name="T38"> <text:s text:c="7"/>line = </text:span><text:span text:style-name="T37">infile</text:span><text:span text:style-name="T38">.readline()</text:span><text:line-break/><text:span text:style-name="T38"> <text:s text:c="7"/># Создание кнопки "Следующая партия"</text:span><text:line-break/><text:span text:style-name="T38"> <text:s text:c="7"/></text:span><text:span text:style-name="T37">if </text:span><text:span text:style-name="T38">line != '' </text:span><text:span text:style-name="T37">and </text:span><text:span text:style-name="T38">numb_of_game == 1:</text:span><text:line-break/><text:span text:style-name="T38"> <text:s text:c="11"/>button_go_next = Button(</text:span><text:span text:style-name="T37">root_son</text:span><text:span text:style-name="T38">, text='Следующая партия', \</text:span><text:line-break/><text:span text:style-name="T38"> <text:s text:c="35"/>command=</text:span><text:span text:style-name="T37">lambda</text:span><text:span text:style-name="T38">: one_game(</text:span><text:span text:style-name="T37">infile</text:span><text:span text:style-name="T38">, </text:span><text:span text:style-name="T37">canvas</text:span><text:span text:style-name="T38">, \</text:span><text:line-break/><text:span text:style-name="T38"> <text:s text:c="61"/></text:span><text:span text:style-name="T37">info</text:span><text:span text:style-name="T38">, </text:span><text:span text:style-name="T37">root_son</text:span><text:span text:style-name="T38">, </text:span><text:span text:style-name="T37">button_go_next</text:span><text:span text:style-name="T38">))</text:span><text:line-break/><text:span text:style-name="T38"> <text:s text:c="11"/></text:span><text:span text:style-name="T37">button_go_next</text:span><text:span text:style-name="T38">.place(x=550, y=400)</text:span><text:line-break/><text:span text:style-name="T38"> <text:s text:c="7"/></text:span><text:span text:style-name="T37">if </text:span><text:span text:style-name="T38">line == '' </text:span><text:span text:style-name="T37">and button_go_next is not </text:span><text:span text:style-name="T38">None:</text:span><text:line-break/><text:span text:style-name="T38"> <text:s text:c="11"/></text:span><text:span text:style-name="T37">button_go_next</text:span><text:span text:style-name="T38">.place_forget()</text:span><text:line-break/><text:line-break/><text:line-break/><text:span text:style-name="T37">def </text:span><text:span text:style-name="T38">main(</text:span><text:span text:style-name="T37">file_name</text:span><text:span text:style-name="T38">, </text:span><text:span text:style-name="T37">root</text:span><text:span text:style-name="T38">):</text:span><text:line-break/><text:span text:style-name="T38"> <text:s text:c="3"/></text:span><text:span text:style-name="T37">global </text:span><text:span text:style-name="T38">numb_of_game</text:span><text:line-break/><text:span text:style-name="T38"> <text:s text:c="3"/>numb_of_game = 0</text:span><text:line-break/><text:span text:style-name="T38"> <text:s text:c="3"/></text:span><text:span text:style-name="T37">if file_name </text:span><text:span text:style-name="T38">== '':</text:span><text:line-break/><text:span text:style-name="T38"> <text:s text:c="7"/>mb.showerror('Ошибка', 'Вы не выбрали файл для работы.')</text:span><text:line-break/><text:span text:style-name="T38"> <text:s text:c="7"/></text:span><text:span text:style-name="T37">return</text:span><text:line-break/><text:span text:style-name="T37"> <text:s text:c="3"/>else</text:span><text:span text:style-name="T38">:</text:span><text:line-break/><text:span text:style-name="T38"> <text:s text:c="7"/>infile = open(</text:span><text:span text:style-name="T37">file_name</text:span><text:span text:style-name="T38">)</text:span><text:line-break/><text:line-break/><text:span text:style-name="T38"> <text:s text:c="3"/>''' Настройка окна игрового поля. '''</text:span><text:line-break/><text:span text:style-name="T38"> <text:s text:c="3"/>root_son = Toplevel(</text:span><text:span text:style-name="T37">root</text:span><text:span text:style-name="T38">, bg='#81F7D8')</text:span><text:line-break/><text:span text:style-name="T38"> <text:s text:c="3"/>root_son.title('Квадратник. Игровое поле. [УВП №1]')</text:span><text:line-break/><text:span text:style-name="T38"> <text:s text:c="3"/>root_son.geometry('680x450')</text:span><text:line-break/><text:span text:style-name="T38"> <text:s text:c="3"/>root_son.maxsize(width=680, height=450)</text:span><text:line-break/><text:span text:style-name="T38"> <text:s text:c="3"/>root_son.minsize(width=680, height=450)</text:span><text:line-break/><text:span text:style-name="T38"> <text:s text:c="3"/>canvas = Canvas(root_son, width=450, height=450, bg='#81BEF7')</text:span><text:line-break/><text:span text:style-name="T38"> <text:s text:c="3"/>canvas.pack(anchor=W)</text:span><text:line-break/><text:span text:style-name="T38"> <text:s text:c="3"/>info = Label(root_son, text='', font='Garamond 12', bg='#81F7D8')</text:span><text:line-break/><text:span text:style-name="T38"> <text:s text:c="3"/>info.place(x=465, y=20)</text:span><text:line-break/><text:span text:style-name="T38"> <text:s text:c="3"/>one_game(infile, canvas, info, root_son)</text:span><text:line-break/><text:line-break/><text:line-break/><text:span text:style-name="T38">'''</text:span></text:p>
      <text:p text:style-name="P39"><text:line-break/><text:span text:style-name="T38">****** Создание корневого графического окна, кнопок и надписей. ******</text:span><text:line-break/><text:line-break/><text:span text:style-name="T38">*** Обозначение переменных:</text:span><text:line-break/><text:line-break/><text:span text:style-name="T38">root - корневое граф. окно; infile - название файла для работы.</text:span><text:line-break/><text:span text:style-name="T38">bg_label - текстовая метка для вывода фона. bg_image - фон корневого окна.</text:span><text:line-break/><text:span text:style-name="T38">root.maxsize; root.minsize - макс. и мин. размер окна.</text:span><text:line-break/><text:span text:style-name="T38">root.title, root.geometry название окна и размер окна.</text:span><text:line-break/><text:span text:style-name="T38">info_about - информация о программе.</text:span><text:line-break/><text:line-break/><text:span text:style-name="T38">*** Кнопки:</text:span><text:line-break/><text:line-break/><text:span text:style-name="T38">button1 - Запустить программу</text:span><text:line-break/><text:soft-page-break/><text:span text:style-name="T38">button2 - Выбрать текстовый файл</text:span><text:line-break/><text:span text:style-name="T38">button3 - О программе</text:span><text:line-break/><text:span text:style-name="T38">button_exit - Выйти из программы</text:span><text:line-break/><text:span text:style-name="T38">button_menu - Вернуться в меню</text:span><text:line-break/><text:line-break/><text:span text:style-name="T38">*** Функции:</text:span><text:line-break/><text:line-break/><text:span text:style-name="T38">1. about_programm - вызывается при нажатии на клавишу "О программе" (button3).</text:span><text:line-break/><text:span text:style-name="T38">Суть функции: делает невидимыми 4 кнопки из главного меню из-за место</text:span><text:line-break/><text:span text:style-name="T38">них показывает текстовое поле с информацией о программе.</text:span><text:line-break/><text:span text:style-name="T38">Так же делает видимой кнопку "Вернуться в меню" (button_menu).</text:span><text:line-break/><text:line-break/><text:span text:style-name="T38">2. back_to_menu - вызывается при нажатии на кнопку "Вернуться в меню" (button_menu)</text:span><text:line-break/><text:span text:style-name="T38">Суть функции: делает видимыми 4 клавиши главного меню, скрывает текст и</text:span><text:line-break/><text:span text:style-name="T38">клавишу "Вернуться в меню".</text:span><text:line-break/><text:line-break/><text:span text:style-name="T38">3. choice_file - вызывается при нажатии клавиши "Выбрать файл для работы" (button2)</text:span><text:line-break/><text:span text:style-name="T38">Суть функции: вызывает диалоговое окно выбора текстового файла. В случае выбора</text:span><text:line-break/><text:span text:style-name="T38">НЕ текстового файла, окно вызывается снова. При повторном выборе файла, предыдущий</text:span><text:line-break/><text:span text:style-name="T38">закрывается.</text:span><text:line-break/><text:line-break/><text:span text:style-name="T38">'''</text:span><text:line-break/><text:line-break/><text:line-break/><text:span text:style-name="T37">def </text:span><text:span text:style-name="T38">choice_file(</text:span><text:span text:style-name="T37">infile</text:span><text:span text:style-name="T38">):</text:span><text:line-break/><text:span text:style-name="T38"> <text:s text:c="3"/></text:span><text:span text:style-name="T37">global </text:span><text:span text:style-name="T38">file_name</text:span><text:line-break/><text:span text:style-name="T38"> <text:s text:c="3"/></text:span><text:span text:style-name="T37">if infile </text:span><text:span text:style-name="T38">!= '':</text:span><text:line-break/><text:span text:style-name="T38"> <text:s text:c="7"/></text:span><text:span text:style-name="T37">infile</text:span><text:span text:style-name="T38">.close()</text:span><text:line-break/><text:span text:style-name="T38"> <text:s text:c="3"/></text:span><text:span text:style-name="T37">while </text:span><text:span text:style-name="T38">True:</text:span><text:line-break/><text:span text:style-name="T38"> <text:s text:c="7"/>file_name = fd.askopenfilename()</text:span><text:line-break/><text:span text:style-name="T38"> <text:s text:c="7"/></text:span><text:span text:style-name="T37">if </text:span><text:span text:style-name="T38">file_name == '':</text:span><text:line-break/><text:span text:style-name="T38"> <text:s text:c="11"/></text:span><text:span text:style-name="T37">return</text:span><text:line-break/><text:span text:style-name="T37"> <text:s text:c="7"/>if </text:span><text:span text:style-name="T38">(file_name[len(file_name) - 4:]) != '.txt':</text:span><text:line-break/><text:span text:style-name="T38"> <text:s text:c="11"/>mb.showerror('Ошибка', 'Вы выбрали не текстовый файл.')</text:span><text:line-break/><text:span text:style-name="T38"> <text:s text:c="7"/></text:span><text:span text:style-name="T37">else</text:span><text:span text:style-name="T38">:</text:span><text:line-break/><text:span text:style-name="T38"> <text:s text:c="11"/></text:span><text:span text:style-name="T37">return</text:span><text:line-break/><text:line-break/><text:line-break/><text:span text:style-name="T37">def </text:span><text:span text:style-name="T38">back_to_menu():</text:span><text:line-break/><text:span text:style-name="T38"> <text:s text:c="3"/># Скрытие, показ кнопок и текста.</text:span><text:line-break/><text:span text:style-name="T38"> <text:s text:c="3"/>button_menu.pack_forget()</text:span><text:line-break/><text:span text:style-name="T38"> <text:s text:c="3"/>info_about.pack_forget()</text:span><text:line-break/><text:span text:style-name="T38"> <text:s text:c="3"/>button1.pack(ipady=5, pady=12)</text:span><text:line-break/><text:span text:style-name="T38"> <text:s text:c="3"/>button2.pack(ipady=5, pady=12)</text:span><text:line-break/><text:span text:style-name="T38"> <text:s text:c="3"/>button3.pack(ipady=5, pady=12)</text:span><text:line-break/><text:span text:style-name="T38"> <text:s text:c="3"/>button_exit.pack(ipady=5, pady=12)</text:span><text:line-break/><text:line-break/><text:line-break/><text:span text:style-name="T37">def </text:span><text:span text:style-name="T38">about_programm():</text:span><text:line-break/><text:span text:style-name="T38"> <text:s text:c="3"/># Скрытие, показ кнопок и текста.</text:span><text:line-break/><text:span text:style-name="T38"> <text:s text:c="3"/>button1.pack_forget()</text:span><text:line-break/><text:span text:style-name="T38"> <text:s text:c="3"/>button2.pack_forget()</text:span><text:line-break/><text:soft-page-break/><text:span text:style-name="T38"> <text:s text:c="3"/>button3.pack_forget()</text:span><text:line-break/><text:span text:style-name="T38"> <text:s text:c="3"/>button_exit.pack_forget()</text:span><text:line-break/><text:span text:style-name="T38"> <text:s text:c="3"/>info_about.pack(pady=50)</text:span><text:line-break/><text:span text:style-name="T38"> <text:s text:c="3"/>button_menu.pack(ipady=5, pady=5)</text:span><text:line-break/><text:line-break/><text:line-break/><text:span text:style-name="T38">''' Создаём корневое окно настраем его '''</text:span><text:line-break/><text:line-break/><text:span text:style-name="T38">root = Tk()</text:span><text:line-break/><text:span text:style-name="T38">file_name = ''</text:span><text:line-break/><text:span text:style-name="T38">infile = ''</text:span><text:line-break/><text:span text:style-name="T38">bg_image = PhotoImage(file='bg_main.png')</text:span><text:line-break/><text:span text:style-name="T38">bg_label = Label(image=bg_image)</text:span><text:line-break/><text:line-break/><text:span text:style-name="T38">button1 = Button(root, text= \</text:span><text:line-break/><text:span text:style-name="T38"> <text:s text:c="3"/>'Запустить программу', width=21, bg='#58ACFA', \</text:span><text:line-break/><text:span text:style-name="T38"> <text:s text:c="16"/>command=</text:span><text:span text:style-name="T37">lambda</text:span><text:span text:style-name="T38">: main(file_name, root))</text:span><text:line-break/><text:line-break/><text:span text:style-name="T38">button2 = Button(root, text= \</text:span><text:line-break/><text:span text:style-name="T38"> <text:s text:c="3"/>'Выбрать файл для работы', bg='#58ACFA', command=</text:span><text:span text:style-name="T37">lambda</text:span><text:span text:style-name="T38">: choice_file(infile))</text:span><text:line-break/><text:line-break/><text:span text:style-name="T38">button3 = Button(root, text= \</text:span><text:line-break/><text:span text:style-name="T38"> <text:s text:c="3"/>'О программе', width=21, bg='#58ACFA', command=about_programm)</text:span><text:line-break/><text:line-break/><text:span text:style-name="T38">button_exit = Button(text= \</text:span><text:line-break/><text:span text:style-name="T38"> <text:s text:c="24"/>'Выйти', width=21, bg='red', command=exit)</text:span><text:line-break/><text:line-break/><text:span text:style-name="T38">button_menu = Button(text= \</text:span><text:line-break/><text:span text:style-name="T38"> <text:s text:c="24"/>'Вернуться в меню', width=21, bg='#FA58D0', command=back_to_menu)</text:span><text:line-break/><text:line-break/><text:span text:style-name="T38">info_about = Label(text= \</text:span><text:line-break/><text:span text:style-name="T38"> <text:s text:c="22"/>'0 \nвычислительный практикум\n1\n2\n3\n4', bg='#A9F5E1')</text:span><text:line-break/><text:line-break/><text:span text:style-name="T38">label = Label(root, text='by Alexey Romanov\nIU7-13', \</text:span><text:line-break/><text:span text:style-name="T38"> <text:s text:c="13"/>justify='right', bg='#013ADF')</text:span><text:line-break/><text:line-break/><text:span text:style-name="T38"># Настройка окна и кнопок:</text:span><text:line-break/><text:line-break/><text:span text:style-name="T38">bg_label.place(x=0, y=0, relwidth=1, relheight=1)</text:span><text:line-break/><text:span text:style-name="T38">root.maxsize(width=290, height=450)</text:span><text:line-break/><text:span text:style-name="T38">root.minsize(width=290, height=450)</text:span><text:line-break/><text:span text:style-name="T38">root.title('Квадратник [УВП №1]')</text:span><text:line-break/><text:span text:style-name="T38">root.geometry('290x450')</text:span><text:line-break/><text:span text:style-name="T38">button1.pack(ipady=5, pady=12)</text:span><text:line-break/><text:span text:style-name="T38">button2.pack(ipady=5, pady=12)</text:span><text:line-break/><text:span text:style-name="T38">button3.pack(ipady=5, pady=12)</text:span><text:line-break/><text:span text:style-name="T38">button_exit.pack(ipady=5, pady=12)</text:span><text:line-break/><text:span text:style-name="T38">label.place(x=175, y=410)</text:span><text:line-break/><text:span text:style-name="T38">root.mainloop()</text:span></text:p>
      <text:p text:style-name="P56"/>
      <text:p text:style-name="P52"><text:soft-page-break/>Заключение.</text:p>
      <text:p text:style-name="P48"/>
      <text:p text:style-name="P36">Выполнив данную работу, <text:span text:style-name="T54">можно сделать вывод о</text:span> способности языка <text:span text:style-name="T44">программирования </text:span><text:span text:style-name="T27">Python </text:span>быстро и практично выполнять прикладные задачи. <text:span text:style-name="T42">Данная программа должна посчитать, сколько было составлено квадратов на игровом поле. Безусловно, если игровое поле размером более чем 5 * 5, <text:s/>то подсчёт квадратов в ручную становится проблематичным, так как: <text:line-break/>1. Для </text:span><text:span text:style-name="T2">точного</text:span><text:span text:style-name="T42"> подсчёта квадратов в ручную и без ошибок понадобится несколько минут.</text:span></text:p>
      <text:p text:style-name="P37">2. Количество времени для подсчёта увеличивается прямо пропорционально размеру игровому поля и количеству линий на нём. <text:s/>(Конечно, время выполнения программы тоже становится дольше на несколько тысячных секунд, но это не сопоставимо с несколькими минутами подсчёта в ручную)</text:p>
      <text:p text:style-name="P37">3. Шанс ошибки <text:s/>при подсчёте в ручную очень велик, что приводит к неоднократной перепроверке подсчётов.</text:p>
      <text:p text:style-name="P36"><text:span text:style-name="T43">Таким образом, мы можем убедиться, насколько автоматизация даже таких простых задач упрощает жизнь в современном мире. <text:line-break/></text:span>Ко всему этому можно добавить, <text:span text:style-name="T42">что язык программирования </text:span><text:span text:style-name="T29">Python </text:span><text:span text:style-name="T44">с помощью библиотеки </text:span><text:span text:style-name="T29">tkinter </text:span><text:span text:style-name="T44">способен работать с графическими окнами и создавать простейший интерфейс программы. Несмотря на небольшой функционал, главным плюсом этой библиотеки является простота её понимания.</text:span></text:p>
      <text:p text:style-name="P38">Подводя итог, можно смело заявить, что язык программирования <text:span text:style-name="T27">Python – </text:span>от<text:span text:style-name="T49">лич</text:span>ный инструмент для решения простейших прикладных задач.</text:p>
      <text:p text:style-name="P34"/>
      <text:p text:style-name="P34"/>
      <text:p text:style-name="P53">Список литературы.</text:p>
      <text:p text:style-name="P53"/>
      <text:p text:style-name="P32"><text:span text:style-name="T8">1. </text:span><text:span text:style-name="T5">Лутц М. «Изучаем Python», 4-е издание. — Пер. с англ. — СПб.: Символ-Плюс, 2011. — 1280 с.</text:span><text:span text:style-name="T6">:</text:span><text:span text:style-name="T5"> ил.</text:span></text:p>
      <text:p text:style-name="P49"><text:span text:style-name="T33">2. </text:span><text:span text:style-name="T34">«</text:span><text:span text:style-name="T26">Python </text:span><text:span text:style-name="T33">на примерах. </text:span><text:span text:style-name="T34">Практический курс по программированию». 2-е издание. – СПб.: Наука и техника, 2017. – 432 с.: ил.</text:span></text:p>
      <text:p text:style-name="P49"><text:span text:style-name="T32">3</text:span><text:span text:style-name="T34">. </text:span><text:span text:style-name="T50">https://docs.python.org/3/library/tkinter.html</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20:11:03.293000000</meta:creation-date>
    <dc:date>2018-12-17T13:27:41.167000000</dc:date>
    <meta:editing-duration>PT4H26M1S</meta:editing-duration>
    <meta:editing-cycles>23</meta:editing-cycles>
    <meta:generator>LibreOffice/5.3.2.2$Windows_X86_64 LibreOffice_project/6cd4f1ef626f15116896b1d8e1398b56da0d0ee1</meta:generator>
    <meta:document-statistic meta:table-count="0" meta:image-count="2" meta:object-count="0" meta:page-count="15" meta:paragraph-count="87" meta:word-count="2567" meta:character-count="21708" meta:non-whitespace-character-count="16546"/>
  </office:meta>
</office:document-meta>
</file>